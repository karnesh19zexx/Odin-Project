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.0193in" fo:border="0.06pt solid #000000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loext:padding="0.0193in" loext:border="0.06pt solid #000000"/>
    </style:style>
    <style:style style:name="T1" style:family="text">
      <style:text-properties style:text-line-through-style="none" style:text-line-through-type="none" style:text-underline-style="none" fo:font-weight="bold" style:text-blinking="false" loext:padding="0.0193in" loext:border="0.06pt solid #000000"/>
    </style:style>
    <style:style style:name="T2" style:family="text">
      <style:text-properties fo:font-family="ui-monospace, SFMono-Regular, Menlo, Monaco, Consolas, 'Liberation Mono', 'Courier New', monospace" fo:font-weight="normal" loext:padding-left="0.0417in" loext:padding-right="0in" loext:padding-top="0.0417in" loext:padding-bottom="0.0417in" loext:border-left="0.06pt solid #000000" loext:border-right="none" loext:border-top="0.06pt solid #000000" loext:border-bottom="0.06pt solid #000000"/>
    </style:style>
    <style:style style:name="fr1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scrollbar="false" draw:frame-display-border="fals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a xlink:type="simple" xlink:href="https://www.theodinproject.com/lessons/foundations-block-and-inline#divs-and-spans" text:style-name="Internet_20_link" text:visited-style-name="Visited_20_Internet_20_Link"><text:bookmark text:name="divs-and-spans"/><text:span text:style-name="T1">Divs and spans</text:span></text:a></text:h>
      <text:p text:style-name="P1">When building a web page, not every piece of content has a specific semantic tag. Sometimes, you just need a container you can style or position! That’s where <text:span text:style-name="Source_20_Text"><text:span text:style-name="T2">div</text:span></text:span> and <text:span text:style-name="Source_20_Text"><text:span text:style-name="T2">span</text:span></text:span> come in.</text:p>
      <text:p text:style-name="P1">A <text:span text:style-name="Source_20_Text"><text:span text:style-name="T2">div</text:span></text:span> is a generic block-level container. It behaves like a rectangular section that, by default, stretches across the full width of its parent and starts on a new line. Typically, you would use a <text:span text:style-name="Source_20_Text"><text:span text:style-name="T2">div</text:span></text:span> to group related elements inside page components, such as grouping cards, sections, sidebars, or navigation bars.</text:p>
      <text:p text:style-name="P1">In this case, when you wrap content in a <text:span text:style-name="Source_20_Text"><text:span text:style-name="T2">div</text:span></text:span> and give it a <text:span text:style-name="Source_20_Text"><text:span text:style-name="T2">class</text:span></text:span> or <text:span text:style-name="Source_20_Text"><text:span text:style-name="T2">id</text:span></text:span>, you create a convenient hook for CSS layout and styling!</text:p>
      <text:p text:style-name="P2"><draw:frame draw:style-name="fr1" draw:name="Object1" text:anchor-type="as-char" svg:width="6.8335in" svg:height="3.1252in" draw:z-index="0"><draw:floating-frame xlink:href="https://codepen.io/TheOdinProjectExamples/embed/preview/KKXXbwR?height=300&amp;theme-id=dark&amp;default-tab=html%2Cresult&amp;slug-hash=KKXXbwR&amp;preview=true&amp;user=TheOdinProjectExamples&amp;name=cp_embed_1" xlink:type="simple" xlink:show="embed" xlink:actuate="onLoad" draw:frame-name="cp_embed_1"/></draw:frame></text:p>
      <text:p text:style-name="P1">A <text:span text:style-name="Source_20_Text"><text:span text:style-name="T2">span</text:span></text:span> is a generic inline container. It sits inside a line of text and only takes up as much space as its content. Unlike <text:span text:style-name="Source_20_Text"><text:span text:style-name="T2">div</text:span></text:span>, it does not start on a new line. You use <text:span text:style-name="Source_20_Text"><text:span text:style-name="T2">span</text:span></text:span> when you want to style or target just part of a sentence. For example, when you want to highlight a single word or attach a tooltip to a phrase, you can wrap it in a <text:span text:style-name="Source_20_Text"><text:span text:style-name="T2">span</text:span></text:span> then add a <text:span text:style-name="Source_20_Text"><text:span text:style-name="T2">class</text:span></text:span> or <text:span text:style-name="Source_20_Text"><text:span text:style-name="T2">id</text:span></text:span> so CSS can find and manipulate it.</text:p>
      <text:p text:style-name="P1"/>
      <text:p text:style-name="P2"><text:soft-page-break/><draw:frame draw:style-name="fr1" draw:name="Object2" text:anchor-type="as-char" svg:width="6.8335in" svg:height="3.1252in" draw:z-index="1"><draw:floating-frame xlink:href="https://codepen.io/TheOdinProjectExamples/embed/preview/abLLPor?height=300&amp;theme-id=dark&amp;default-tab=html%2Cresult&amp;slug-hash=abLLPor&amp;preview=true&amp;user=TheOdinProjectExamples&amp;name=cp_embed_2" xlink:type="simple" xlink:show="embed" xlink:actuate="onLoad" draw:frame-name="cp_embed_2"/></draw:frame></text:p>
      <text:p text:style-name="P1">Neither <text:span text:style-name="Source_20_Text"><text:span text:style-name="T2">div</text:span></text:span> nor <text:span text:style-name="Source_20_Text"><text:span text:style-name="T2">span</text:span></text:span> adds meaning to the content the way semantic tags do, as they exist to give you flexible “building blocks”. The key difference is how they behave in the layout: <text:span text:style-name="Source_20_Text"><text:span text:style-name="T2">div</text:span></text:span> participates in the flow as a block-level element, while <text:span text:style-name="Source_20_Text"><text:span text:style-name="T2">span</text:span></text:span> behaves as an inline element. Once you understand that, choosing between them becomes simple! You can use <text:span text:style-name="Source_20_Text"><text:span text:style-name="T2">div</text:span></text:span> when you’re grouping and positioning bigger blocks of content, and <text:span text:style-name="Source_20_Text"><text:span text:style-name="T2">span</text:span></text:span> when you’re styling or scripting small pieces inside a line.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12:17:59.627205177</meta:creation-date>
    <dc:date>2026-06-13T12:18:29.243037880</dc:date>
    <meta:editing-duration>PT31S</meta:editing-duration>
    <meta:editing-cycles>1</meta:editing-cycles>
    <meta:document-statistic meta:table-count="0" meta:image-count="0" meta:object-count="2" meta:page-count="2" meta:paragraph-count="9" meta:word-count="284" meta:character-count="1529" meta:non-whitespace-character-count="1250"/>
    <meta:generator>LibreOffice/26.2.4.2$Linux_X86_64 LibreOffice_project/c44d3140fc62714965bf5d98735e0d79ba4b1ebd</meta:generator>
  </office:meta>
</office:document-meta>
</file>