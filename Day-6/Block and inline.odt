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font-weight="bold" officeooo:rsid="000e2829" officeooo:paragraph-rsid="000e2829" style:font-weight-asian="bold" style:font-weight-complex="bold"/>
    </style:style>
    <style:style style:name="P3" style:family="paragraph" style:parent-style-name="Text_20_body">
      <style:text-properties fo:font-weight="bold" officeooo:rsid="000e2829" officeooo:paragraph-rsid="000e2829" style:font-weight-asian="bold" style:font-weight-complex="bold"/>
    </style:style>
    <style:style style:name="P4" style:family="paragraph" style:parent-style-name="Preformatted_20_Text">
      <style:paragraph-properties fo:margin-top="0in" fo:margin-bottom="0.1965in" style:contextual-spacing="false"/>
      <style:text-properties fo:font-weight="bold" officeooo:rsid="000e2829" style:font-weight-asian="bold" style:font-weight-complex="bold"/>
    </style:style>
    <style:style style:name="P5" style:family="paragraph" style:parent-style-name="Text_20_body">
      <style:text-properties fo:font-weight="bold" officeooo:rsid="000e2829" style:font-weight-asian="bold" style:font-weight-complex="bold"/>
    </style:style>
    <style:style style:name="P6" style:family="paragraph" style:parent-style-name="Horizontal_20_Line">
      <style:text-properties fo:font-weight="bold" officeooo:rsid="000e2829" style:font-weight-asian="bold" style:font-weight-complex="bold"/>
    </style:style>
    <style:style style:name="P7" style:family="paragraph" style:parent-style-name="Heading_20_1">
      <style:text-properties officeooo:rsid="000e2829"/>
    </style:style>
    <style:style style:name="P8" style:family="paragraph" style:parent-style-name="Heading_20_2">
      <style:text-properties officeooo:rsid="000e2829"/>
    </style:style>
    <style:style style:name="P9" style:family="paragraph" style:parent-style-name="Preformatted_20_Text">
      <style:text-properties fo:font-weight="bold" officeooo:rsid="000e2829" style:font-weight-asian="bold" style:font-weight-complex="bold"/>
    </style:style>
    <style:style style:name="P10" style:family="paragraph" style:parent-style-name="Heading_20_3">
      <style:text-properties officeooo:rsid="000e2829"/>
    </style:style>
    <style:style style:name="P11" style:family="paragraph" style:parent-style-name="Text_20_body" style:list-style-name="L1">
      <style:text-properties fo:font-weight="bold" officeooo:rsid="000e2829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et's forget the technical terms for a minute and look at what you actually <text:span text:style-name="Strong_20_Emphasis">see on the screen</text:span>.</text:p>
      <text:h text:style-name="Heading_20_2" text:outline-level="2">Block Elements = "Take the whole row"</text:h>
      <text:p text:style-name="Text_20_body">Imagine a classroom bench.</text:p>
      <text:p text:style-name="Text_20_body">A block element is a student who says:</text:p>
      <text:p text:style-name="Quotations">"I'm taking the entire bench. Nobody sits next to me."</text:p>
      <text:p text:style-name="Text_20_body">Example:</text:p>
      <text:p text:style-name="Preformatted_20_Text"><text:span text:style-name="Source_20_Text">&lt;h1&gt;Heading&lt;/h1&gt;</text:span></text:p>
      <text:p text:style-name="P1"><text:span text:style-name="Source_20_Text">&lt;p&gt;Paragraph&lt;/p&gt;</text:span></text:p>
      <text:p text:style-name="Text_20_body">Output:</text:p>
      <text:p text:style-name="Preformatted_20_Text"><text:span text:style-name="Source_20_Text">Heading</text:span></text:p>
      <text:p text:style-name="Preformatted_20_Text"/>
      <text:p text:style-name="P1"><text:span text:style-name="Source_20_Text">Paragraph</text:span></text:p>
      <text:p text:style-name="Text_20_body">The <text:span text:style-name="Source_20_Text">&lt;p&gt;</text:span> starts on a new line because <text:span text:style-name="Source_20_Text">&lt;h1&gt;</text:span> took the whole row.</text:p>
      <text:p text:style-name="Horizontal_20_Line"/>
      <text:h text:style-name="Heading_20_2" text:outline-level="2">Inline Elements = "Share the row"</text:h>
      <text:p text:style-name="Text_20_body">An inline element says:</text:p>
      <text:p text:style-name="Quotations">"I'll only take the space I need."</text:p>
      <text:p text:style-name="Text_20_body">Example:</text:p>
      <text:p text:style-name="P1"><text:span text:style-name="Source_20_Text">I love &lt;a href="#"&gt;pizza&lt;/a&gt; very much.</text:span></text:p>
      <text:p text:style-name="Text_20_body">Output:</text:p>
      <text:p text:style-name="P1"><text:span text:style-name="Source_20_Text">I love pizza very much.</text:span></text:p>
      <text:p text:style-name="Text_20_body">The link (<text:span text:style-name="Source_20_Text">&lt;a&gt;</text:span>) stays inside the sentence.</text:p>
      <text:p text:style-name="Text_20_body">It doesn't jump to a new line.</text:p>
      <text:p text:style-name="Horizontal_20_Line"/>
      <text:h text:style-name="Heading_20_2" text:outline-level="2">Compare Directly</text:h>
      <text:h text:style-name="Heading_20_3" text:outline-level="3">Block</text:h>
      <text:p text:style-name="Preformatted_20_Text"><text:span text:style-name="Source_20_Text">&lt;div&gt;One&lt;/div&gt;</text:span></text:p>
      <text:p text:style-name="Preformatted_20_Text"><text:span text:style-name="Source_20_Text">&lt;div&gt;Two&lt;/div&gt;</text:span></text:p>
      <text:p text:style-name="P1"><text:span text:style-name="Source_20_Text">&lt;div&gt;Three&lt;/div&gt;</text:span></text:p>
      <text:p text:style-name="Text_20_body"><text:soft-page-break/>Output:</text:p>
      <text:p text:style-name="Preformatted_20_Text"><text:span text:style-name="Source_20_Text">One</text:span></text:p>
      <text:p text:style-name="Preformatted_20_Text"><text:span text:style-name="Source_20_Text">Two</text:span></text:p>
      <text:p text:style-name="P1"><text:span text:style-name="Source_20_Text">Three</text:span></text:p>
      <text:p text:style-name="Text_20_body">Each gets its own row.</text:p>
      <text:p text:style-name="Horizontal_20_Line"/>
      <text:h text:style-name="Heading_20_3" text:outline-level="3">Inline</text:h>
      <text:p text:style-name="Preformatted_20_Text"><text:span text:style-name="Source_20_Text">&lt;span&gt;One&lt;/span&gt;</text:span></text:p>
      <text:p text:style-name="Preformatted_20_Text"><text:span text:style-name="Source_20_Text">&lt;span&gt;Two&lt;/span&gt;</text:span></text:p>
      <text:p text:style-name="P1"><text:span text:style-name="Source_20_Text">&lt;span&gt;Three&lt;/span&gt;</text:span></text:p>
      <text:p text:style-name="Text_20_body">Output:</text:p>
      <text:p text:style-name="P1"><text:span text:style-name="Source_20_Text">One Two Three</text:span></text:p>
      <text:p text:style-name="Text_20_body">All stay on the same row.</text:p>
      <text:p text:style-name="Horizontal_20_Line"/>
      <text:h text:style-name="Heading_20_2" text:outline-level="2">Why does <text:span text:style-name="Source_20_Text">&lt;a&gt;</text:span> behave differently?</text:h>
      <text:p text:style-name="Text_20_body">Look at this:</text:p>
      <text:p text:style-name="Preformatted_20_Text"><text:span text:style-name="Source_20_Text">&lt;p&gt;</text:span></text:p>
      <text:p text:style-name="Preformatted_20_Text"><text:span text:style-name="Source_20_Text"><text:s text:c="2"/>Visit &lt;a href="#"&gt;Google&lt;/a&gt; now.</text:span></text:p>
      <text:p text:style-name="P1"><text:span text:style-name="Source_20_Text">&lt;/p&gt;</text:span></text:p>
      <text:p text:style-name="Text_20_body">Output:</text:p>
      <text:p text:style-name="P1"><text:span text:style-name="Source_20_Text">Visit Google now.</text:span></text:p>
      <text:p text:style-name="Text_20_body">If <text:span text:style-name="Source_20_Text">&lt;a&gt;</text:span> were block, you'd get:</text:p>
      <text:p text:style-name="Preformatted_20_Text"><text:span text:style-name="Source_20_Text">Visit</text:span></text:p>
      <text:p text:style-name="Preformatted_20_Text"/>
      <text:p text:style-name="Preformatted_20_Text"><text:span text:style-name="Source_20_Text">Google</text:span></text:p>
      <text:p text:style-name="Preformatted_20_Text"/>
      <text:p text:style-name="P1"><text:span text:style-name="Source_20_Text">now.</text:span></text:p>
      <text:p text:style-name="Text_20_body">That would be ugly.</text:p>
      <text:p text:style-name="Text_20_body">So links are inline by default.</text:p>
      <text:p text:style-name="Horizontal_20_Line"/>
      <text:h text:style-name="Heading_20_2" text:outline-level="2"><text:soft-page-break/>The easiest way to remember</text:h>
      <text:h text:style-name="Heading_20_3" text:outline-level="3">Block Elements</text:h>
      <text:p text:style-name="Text_20_body">Think:</text:p>
      <text:p text:style-name="P1"><text:span text:style-name="Source_20_Text">BIG BOXES</text:span></text:p>
      <text:p text:style-name="Text_20_body">Examples:</text:p>
      <text:p text:style-name="Preformatted_20_Text"><text:span text:style-name="Source_20_Text">&lt;div&gt;</text:span></text:p>
      <text:p text:style-name="Preformatted_20_Text"><text:span text:style-name="Source_20_Text">&lt;h1&gt;</text:span></text:p>
      <text:p text:style-name="Preformatted_20_Text"><text:span text:style-name="Source_20_Text">&lt;p&gt;</text:span></text:p>
      <text:p text:style-name="Preformatted_20_Text"><text:span text:style-name="Source_20_Text">&lt;ul&gt;</text:span></text:p>
      <text:p text:style-name="P1"><text:span text:style-name="Source_20_Text">&lt;li&gt;</text:span></text:p>
      <text:p text:style-name="Text_20_body">They stack vertically.</text:p>
      <text:p text:style-name="Preformatted_20_Text"><text:span text:style-name="Source_20_Text">Box 1</text:span></text:p>
      <text:p text:style-name="Preformatted_20_Text"><text:span text:style-name="Source_20_Text">Box 2</text:span></text:p>
      <text:p text:style-name="P1"><text:span text:style-name="Source_20_Text">Box 3</text:span></text:p>
      <text:p text:style-name="Horizontal_20_Line"/>
      <text:h text:style-name="Heading_20_3" text:outline-level="3">Inline Elements</text:h>
      <text:p text:style-name="Text_20_body">Think:</text:p>
      <text:p text:style-name="P1"><text:span text:style-name="Source_20_Text">WORDS INSIDE TEXT</text:span></text:p>
      <text:p text:style-name="Text_20_body">Examples:</text:p>
      <text:p text:style-name="Preformatted_20_Text"><text:span text:style-name="Source_20_Text">&lt;span&gt;</text:span></text:p>
      <text:p text:style-name="Preformatted_20_Text"><text:span text:style-name="Source_20_Text">&lt;a&gt;</text:span></text:p>
      <text:p text:style-name="Preformatted_20_Text"><text:span text:style-name="Source_20_Text">&lt;strong&gt;</text:span></text:p>
      <text:p text:style-name="P1"><text:span text:style-name="Source_20_Text">&lt;em&gt;</text:span></text:p>
      <text:p text:style-name="Text_20_body">They flow horizontally.</text:p>
      <text:p text:style-name="P1"><text:span text:style-name="Source_20_Text">word word word</text:span></text:p>
      <text:p text:style-name="Horizontal_20_Line"/>
      <text:h text:style-name="Heading_20_2" text:outline-level="2">Why Odin mentions padding and margin</text:h>
      <text:p text:style-name="Text_20_body">Suppose:</text:p>
      <text:p text:style-name="P1"><text:span text:style-name="Source_20_Text">&lt;span&gt;Hello&lt;/span&gt;</text:span></text:p>
      <text:p text:style-name="Text_20_body">and</text:p>
      <text:p text:style-name="Preformatted_20_Text"><text:span text:style-name="Source_20_Text">span {</text:span></text:p>
      <text:p text:style-name="Preformatted_20_Text"><text:span text:style-name="Source_20_Text"><text:s text:c="2"/>padding: 50px;</text:span></text:p>
      <text:p text:style-name="P1"><text:span text:style-name="Source_20_Text">}</text:span></text:p>
      <text:p text:style-name="Text_20_body"><text:soft-page-break/>The browser treats <text:span text:style-name="Source_20_Text">&lt;span&gt;</text:span> like text, not a normal box.</text:p>
      <text:p text:style-name="Text_20_body">So the spacing can look strange and not affect surrounding elements the way you expect.</text:p>
      <text:p text:style-name="Text_20_body">That's why beginners usually use:</text:p>
      <text:p text:style-name="P1"><text:span text:style-name="Source_20_Text">&lt;div&gt;</text:span></text:p>
      <text:p text:style-name="Text_20_body">for boxes and layouts,</text:p>
      <text:p text:style-name="Text_20_body">and</text:p>
      <text:p text:style-name="P1"><text:span text:style-name="Source_20_Text">&lt;span&gt;</text:span></text:p>
      <text:p text:style-name="Text_20_body">only for styling small pieces of text.</text:p>
      <text:p text:style-name="Horizontal_20_Line"/>
      <text:h text:style-name="Heading_20_2" text:outline-level="2">Quick Test</text:h>
      <text:p text:style-name="Text_20_body">Predict the output:</text:p>
      <text:p text:style-name="Preformatted_20_Text"><text:span text:style-name="Source_20_Text">&lt;div&gt;Apple&lt;/div&gt;</text:span></text:p>
      <text:p text:style-name="P1"><text:span text:style-name="Source_20_Text">&lt;div&gt;Banana&lt;/div&gt;</text:span></text:p>
      <text:p text:style-name="Text_20_body">Output:</text:p>
      <text:p text:style-name="Preformatted_20_Text"><text:span text:style-name="Source_20_Text">Apple</text:span></text:p>
      <text:p text:style-name="P1"><text:span text:style-name="Source_20_Text">Banana</text:span></text:p>
      <text:p text:style-name="Text_20_body">Because <text:span text:style-name="Source_20_Text">div</text:span> is block.</text:p>
      <text:p text:style-name="Horizontal_20_Line"/>
      <text:p text:style-name="Text_20_body">Predict:</text:p>
      <text:p text:style-name="Preformatted_20_Text"><text:span text:style-name="Source_20_Text">&lt;span&gt;Apple&lt;/span&gt;</text:span></text:p>
      <text:p text:style-name="P1"><text:span text:style-name="Source_20_Text">&lt;span&gt;Banana&lt;/span&gt;</text:span></text:p>
      <text:p text:style-name="Text_20_body">Output:</text:p>
      <text:p text:style-name="P1"><text:span text:style-name="Source_20_Text">Apple Banana</text:span></text:p>
      <text:p text:style-name="Text_20_body">Because <text:span text:style-name="Source_20_Text">span</text:span> is inline.</text:p>
      <text:p text:style-name="Horizontal_20_Line"/>
      <text:p text:style-name="Text_20_body">If you remember only <text:span text:style-name="Strong_20_Emphasis">one thing</text:span>:</text:p>
      <text:p text:style-name="Preformatted_20_Text"><text:span text:style-name="Source_20_Text">Block = New line</text:span></text:p>
      <text:p text:style-name="Preformatted_20_Text"/>
      <text:p text:style-name="P1"><text:span text:style-name="Source_20_Text">Inline = Same line</text:span></text:p>
      <text:p text:style-name="Text_20_body">That's 90% of what The Odin Project wants you to understand in this lesson.</text:p>
      <text:p text:style-name="P2">Inline-Block</text:p>
      <text:p text:style-name="P3"><text:soft-page-break/>This is talking about a <text:span text:style-name="Strong_20_Emphasis">third display type</text:span>:</text:p>
      <text:p text:style-name="P4"><text:span text:style-name="Source_20_Text">display: inline-block;</text:span></text:p>
      <text:p text:style-name="P5">which is a mix of <text:span text:style-name="Strong_20_Emphasis">inline</text:span> and <text:span text:style-name="Strong_20_Emphasis">block</text:span>.</text:p>
      <text:p text:style-name="P6"/>
      <text:h text:style-name="P7" text:outline-level="1">First, remember the two extremes</text:h>
      <text:h text:style-name="P8" text:outline-level="2">Block</text:h>
      <text:p text:style-name="P4"><text:span text:style-name="Source_20_Text">display: block;</text:span></text:p>
      <text:p text:style-name="P5">Example:</text:p>
      <text:p text:style-name="P9"><text:span text:style-name="Source_20_Text">&lt;div&gt;One&lt;/div&gt;</text:span></text:p>
      <text:p text:style-name="P4"><text:span text:style-name="Source_20_Text">&lt;div&gt;Two&lt;/div&gt;</text:span></text:p>
      <text:p text:style-name="P5">Output:</text:p>
      <text:p text:style-name="P9"><text:span text:style-name="Source_20_Text">One</text:span></text:p>
      <text:p text:style-name="P4"><text:span text:style-name="Source_20_Text">Two</text:span></text:p>
      <text:p text:style-name="P5">Characteristics:</text:p>
      <text:p text:style-name="P5">✅ New line</text:p>
      <text:p text:style-name="P5">✅ Width works</text:p>
      <text:p text:style-name="P5">✅ Height works</text:p>
      <text:p text:style-name="P5">✅ Padding works</text:p>
      <text:p text:style-name="P5">✅ Margin works</text:p>
      <text:p text:style-name="P6"/>
      <text:h text:style-name="P8" text:outline-level="2">Inline</text:h>
      <text:p text:style-name="P4"><text:span text:style-name="Source_20_Text">display: inline;</text:span></text:p>
      <text:p text:style-name="P5">Example:</text:p>
      <text:p text:style-name="P9"><text:span text:style-name="Source_20_Text">&lt;span&gt;One&lt;/span&gt;</text:span></text:p>
      <text:p text:style-name="P4"><text:span text:style-name="Source_20_Text">&lt;span&gt;Two&lt;/span&gt;</text:span></text:p>
      <text:p text:style-name="P5">Output:</text:p>
      <text:p text:style-name="P4"><text:span text:style-name="Source_20_Text">One Two</text:span></text:p>
      <text:p text:style-name="P5">Characteristics:</text:p>
      <text:p text:style-name="P5"><text:soft-page-break/>✅ Same line</text:p>
      <text:p text:style-name="P5">❌ Width doesn't work properly</text:p>
      <text:p text:style-name="P5">❌ Height doesn't work properly</text:p>
      <text:p text:style-name="P6"/>
      <text:h text:style-name="P7" text:outline-level="1">The Problem</text:h>
      <text:p text:style-name="P5">Suppose you want:</text:p>
      <text:p text:style-name="P4"><text:span text:style-name="Source_20_Text">[One] [Two] [Three]</text:span></text:p>
      <text:p text:style-name="P5">on the <text:span text:style-name="Strong_20_Emphasis">same line</text:span>,</text:p>
      <text:p text:style-name="P5">but you also want:</text:p>
      <text:p text:style-name="P9"><text:span text:style-name="Source_20_Text">width: 100px;</text:span></text:p>
      <text:p text:style-name="P9"><text:span text:style-name="Source_20_Text">height: 100px;</text:span></text:p>
      <text:p text:style-name="P4"><text:span text:style-name="Source_20_Text">padding: 20px;</text:span></text:p>
      <text:p text:style-name="P5">to work.</text:p>
      <text:p text:style-name="P6"/>
      <text:p text:style-name="P5">Inline can't do that well.</text:p>
      <text:p text:style-name="P5">Block can do that, but puts everything on separate lines.</text:p>
      <text:p text:style-name="P5">So CSS gives us:</text:p>
      <text:p text:style-name="P4"><text:span text:style-name="Source_20_Text">display: inline-block;</text:span></text:p>
      <text:p text:style-name="P6"/>
      <text:h text:style-name="P7" text:outline-level="1">Inline-Block = Best of Both</text:h>
      <text:p text:style-name="P5">Example:</text:p>
      <text:p text:style-name="P9"><text:span text:style-name="Source_20_Text">&lt;div class="box"&gt;One&lt;/div&gt;</text:span></text:p>
      <text:p text:style-name="P9"><text:span text:style-name="Source_20_Text">&lt;div class="box"&gt;Two&lt;/div&gt;</text:span></text:p>
      <text:p text:style-name="P4"><text:span text:style-name="Source_20_Text">&lt;div class="box"&gt;Three&lt;/div&gt;</text:span></text:p>
      <text:p text:style-name="P9"><text:span text:style-name="Source_20_Text">.box {</text:span></text:p>
      <text:p text:style-name="P9"><text:span text:style-name="Source_20_Text"><text:s text:c="2"/>display: inline-block;</text:span></text:p>
      <text:p text:style-name="P9"><text:span text:style-name="Source_20_Text"><text:s text:c="2"/>width: 100px;</text:span></text:p>
      <text:p text:style-name="P9"><text:span text:style-name="Source_20_Text"><text:s text:c="2"/>height: 100px;</text:span></text:p>
      <text:p text:style-name="P9"><text:span text:style-name="Source_20_Text"><text:s text:c="2"/>border: 1px solid black;</text:span></text:p>
      <text:p text:style-name="P4"><text:span text:style-name="Source_20_Text">}</text:span></text:p>
      <text:p text:style-name="P5">Output:</text:p>
      <text:p text:style-name="P9"><text:span text:style-name="Source_20_Text">+-----+ +-----+ +-----+</text:span></text:p>
      <text:p text:style-name="P9"><text:soft-page-break/><text:span text:style-name="Source_20_Text">| One | | Two | |Three|</text:span></text:p>
      <text:p text:style-name="P4"><text:span text:style-name="Source_20_Text">+-----+ +-----+ +-----+</text:span></text:p>
      <text:p text:style-name="P5">All stay on the same line.</text:p>
      <text:p text:style-name="P6"/>
      <text:h text:style-name="P7" text:outline-level="1">Why is it called inline-block?</text:h>
      <text:p text:style-name="P5">Because it behaves:</text:p>
      <text:h text:style-name="P10" text:outline-level="3">Like inline</text:h>
      <text:p text:style-name="P4"><text:span text:style-name="Source_20_Text">Stays beside other elements</text:span></text:p>
      <text:p text:style-name="P5">AND</text:p>
      <text:h text:style-name="P10" text:outline-level="3">Like block</text:h>
      <text:p text:style-name="P9"><text:span text:style-name="Source_20_Text">Width works</text:span></text:p>
      <text:p text:style-name="P9"><text:span text:style-name="Source_20_Text">Height works</text:span></text:p>
      <text:p text:style-name="P9"><text:span text:style-name="Source_20_Text">Padding works</text:span></text:p>
      <text:p text:style-name="P4"><text:span text:style-name="Source_20_Text">Margin works</text:span></text:p>
      <text:p text:style-name="P6"/>
      <text:h text:style-name="P7" text:outline-level="1">Real Example</text:h>
      <text:p text:style-name="P5">Suppose you have navigation buttons.</text:p>
      <text:h text:style-name="P10" text:outline-level="3">Block</text:h>
      <text:p text:style-name="P9"><text:span text:style-name="Source_20_Text">button {</text:span></text:p>
      <text:p text:style-name="P9"><text:span text:style-name="Source_20_Text"><text:s text:c="2"/>display: block;</text:span></text:p>
      <text:p text:style-name="P4"><text:span text:style-name="Source_20_Text">}</text:span></text:p>
      <text:p text:style-name="P5">Output:</text:p>
      <text:p text:style-name="P9"><text:span text:style-name="Source_20_Text">[Home]</text:span></text:p>
      <text:p text:style-name="P9"><text:span text:style-name="Source_20_Text">[About]</text:span></text:p>
      <text:p text:style-name="P4"><text:span text:style-name="Source_20_Text">[Contact]</text:span></text:p>
      <text:p text:style-name="P6"/>
      <text:h text:style-name="P10" text:outline-level="3">Inline</text:h>
      <text:p text:style-name="P9"><text:span text:style-name="Source_20_Text">button {</text:span></text:p>
      <text:p text:style-name="P9"><text:span text:style-name="Source_20_Text"><text:s text:c="2"/>display: inline;</text:span></text:p>
      <text:p text:style-name="P4"><text:span text:style-name="Source_20_Text">}</text:span></text:p>
      <text:p text:style-name="P5">Output:</text:p>
      <text:p text:style-name="P4"><text:soft-page-break/><text:span text:style-name="Source_20_Text">[Home] [About] [Contact]</text:span></text:p>
      <text:p text:style-name="P5">But width and height become awkward.</text:p>
      <text:p text:style-name="P6"/>
      <text:h text:style-name="P10" text:outline-level="3">Inline-Block</text:h>
      <text:p text:style-name="P9"><text:span text:style-name="Source_20_Text">button {</text:span></text:p>
      <text:p text:style-name="P9"><text:span text:style-name="Source_20_Text"><text:s text:c="2"/>display: inline-block;</text:span></text:p>
      <text:p text:style-name="P9"><text:span text:style-name="Source_20_Text"><text:s text:c="2"/>width: 120px;</text:span></text:p>
      <text:p text:style-name="P4"><text:span text:style-name="Source_20_Text">}</text:span></text:p>
      <text:p text:style-name="P5">Output:</text:p>
      <text:p text:style-name="P4"><text:span text:style-name="Source_20_Text">[ Home ] [ About ] [ Contact ]</text:span></text:p>
      <text:p text:style-name="P5">Same line + fixed size.</text:p>
      <text:p text:style-name="P5">Perfect.</text:p>
      <text:p text:style-name="P6"/>
      <text:h text:style-name="P7" text:outline-level="1">Then why does Odin say you'll use Flexbox more?</text:h>
      <text:p text:style-name="P5">Years ago people did layouts like:</text:p>
      <text:p text:style-name="P9"><text:span text:style-name="Source_20_Text">.box {</text:span></text:p>
      <text:p text:style-name="P9"><text:span text:style-name="Source_20_Text"><text:s text:c="2"/>display: inline-block;</text:span></text:p>
      <text:p text:style-name="P4"><text:span text:style-name="Source_20_Text">}</text:span></text:p>
      <text:p text:style-name="P5">to create rows of cards.</text:p>
      <text:p text:style-name="P5">Example:</text:p>
      <text:p text:style-name="P4"><text:span text:style-name="Source_20_Text">[Card 1] [Card 2] [Card 3]</text:span></text:p>
      <text:p text:style-name="P5">But it becomes annoying when:</text:p>
      <text:list text:style-name="L1">
        <text:list-item>
          <text:p text:style-name="P11">You want centering</text:p>
        </text:list-item>
        <text:list-item>
          <text:p text:style-name="P11">Equal spacing</text:p>
        </text:list-item>
        <text:list-item>
          <text:p text:style-name="P11">Responsive layouts</text:p>
        </text:list-item>
        <text:list-item>
          <text:p text:style-name="P11">Vertical alignment</text:p>
        </text:list-item>
      </text:list>
      <text:p text:style-name="P6"/>
      <text:p text:style-name="P5">Modern CSS uses:</text:p>
      <text:p text:style-name="P4"><text:span text:style-name="Source_20_Text">display: flex;</text:span></text:p>
      <text:p text:style-name="P5"><text:soft-page-break/>Example:</text:p>
      <text:p text:style-name="P9"><text:span text:style-name="Source_20_Text">.container {</text:span></text:p>
      <text:p text:style-name="P9"><text:span text:style-name="Source_20_Text"><text:s text:c="2"/>display: flex;</text:span></text:p>
      <text:p text:style-name="P4"><text:span text:style-name="Source_20_Text">}</text:span></text:p>
      <text:p text:style-name="P5">Now the browser automatically lines things up.</text:p>
      <text:p text:style-name="P4"><text:span text:style-name="Source_20_Text">[Card 1] [Card 2] [Card 3]</text:span></text:p>
      <text:p text:style-name="P5">with much less effort.</text:p>
      <text:p text:style-name="P6"/>
      <text:h text:style-name="P7" text:outline-level="1">The Mental Model</text:h>
      <text:p text:style-name="P5">Think of it like this:</text:p>
      <text:p text:style-name="P9"><text:span text:style-name="Source_20_Text">display: block</text:span></text:p>
      <text:p text:style-name="P9"><text:span text:style-name="Source_20_Text">=</text:span></text:p>
      <text:p text:style-name="P4"><text:span text:style-name="Source_20_Text">"I'm a box and I want my own row."</text:span></text:p>
      <text:p text:style-name="P9"><text:span text:style-name="Source_20_Text">display: inline</text:span></text:p>
      <text:p text:style-name="P9"><text:span text:style-name="Source_20_Text">=</text:span></text:p>
      <text:p text:style-name="P4"><text:span text:style-name="Source_20_Text">"I'm just text. I'll stay in the sentence."</text:span></text:p>
      <text:p text:style-name="P9"><text:span text:style-name="Source_20_Text">display: inline-block</text:span></text:p>
      <text:p text:style-name="P9"><text:span text:style-name="Source_20_Text">=</text:span></text:p>
      <text:p text:style-name="P4"><text:span text:style-name="Source_20_Text">"I'm a box, but I'm willing to stand next to other boxes."</text:span></text:p>
      <text:p text:style-name="P5">That's the entire concept behind <text:span text:style-name="Source_20_Text">inline-block</text:span>. Once you learn Flexbox in the next Odin lesson, you'll see why people rarely build layouts with <text:span text:style-name="Source_20_Text">inline-block</text:span> anymore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12:14:16.951938554</meta:creation-date>
    <dc:date>2026-06-13T12:16:35.801516633</dc:date>
    <meta:editing-duration>PT2M20S</meta:editing-duration>
    <meta:editing-cycles>1</meta:editing-cycles>
    <meta:generator>LibreOffice/26.2.4.2$Linux_X86_64 LibreOffice_project/c44d3140fc62714965bf5d98735e0d79ba4b1ebd</meta:generator>
    <meta:document-statistic meta:table-count="0" meta:image-count="0" meta:object-count="0" meta:page-count="9" meta:paragraph-count="237" meta:word-count="727" meta:character-count="4232" meta:non-whitespace-character-count="3728"/>
  </office:meta>
</office:document-meta>
</file>