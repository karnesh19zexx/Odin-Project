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C000001CC07A0A380.jpg" manifest:media-type="image/jpe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in" style:contextual-spacing="false" fo:line-height="142%" fo:text-indent="0in" style:auto-text-indent="false"/>
    </style:style>
    <style:style style:name="P2" style:family="paragraph" style:parent-style-name="Standard">
      <style:paragraph-properties fo:margin-left="0in" fo:margin-right="0in" fo:margin-top="0in" fo:margin-bottom="0in" style:contextual-spacing="false" fo:text-indent="0in" style:auto-text-indent="false"/>
      <style:text-properties loext:padding="0.0193in" loext:border="0.06pt solid #000000"/>
    </style:style>
    <style:style style:name="P3" style:family="paragraph" style:parent-style-name="Text_20_body">
      <style:paragraph-properties fo:margin-left="0.3752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margin-left="0in" fo:margin-right="0in" fo:margin-top="0in" fo:margin-bottom="0in" style:contextual-spacing="false" fo:line-height="120%" fo:orphans="2" fo:widows="2" fo:text-indent="0in" style:auto-text-indent="false" fo:padding="0.0193in" fo:border="0.06pt solid #000000"/>
      <style:text-properties fo:font-variant="normal" fo:text-transform="none" style:font-name="Inter" fo:font-size="22.5pt" fo:letter-spacing="normal" fo:font-style="normal" fo:font-weight="bold" fo:background-color="#ffffff" loext:padding="0.0193in" loext:border="0.06pt solid #000000"/>
    </style:style>
    <style:style style:name="P6" style:family="paragraph" style:parent-style-name="Heading_20_3">
      <style:paragraph-properties fo:margin-left="0in" fo:margin-right="0in" fo:margin-top="0in" fo:margin-bottom="0in" style:contextual-spacing="false" fo:line-height="160%" fo:orphans="65" fo:widows="2" fo:text-indent="0in" style:auto-text-indent="false" fo:padding="0.0193in" fo:border="0.06pt solid #000000"/>
    </style:style>
    <style:style style:name="P7" style:family="paragraph" style:parent-style-name="Text_20_body">
      <style:paragraph-properties fo:margin-left="0in" fo:margin-right="0in" fo:margin-top="0in" fo:margin-bottom="0in" style:contextual-spacing="false" fo:orphans="65" fo:widows="2" fo:text-indent="0in" style:auto-text-indent="false" fo:padding="0.0193in" fo:border="0.06pt solid #000000"/>
    </style:style>
    <style:style style:name="P8" style:family="paragraph" style:parent-style-name="Text_20_body">
      <style:paragraph-properties fo:margin-left="0in" fo:margin-right="0in" fo:margin-top="0in" fo:margin-bottom="0in" style:contextual-spacing="false" fo:orphans="65" fo:widows="2" fo:text-indent="0in" style:auto-text-indent="false" fo:padding="0.0193in" fo:border="0.06pt solid #000000"/>
      <style:text-properties fo:font-variant="normal" fo:text-transform="none" style:font-name="Inter" fo:font-size="14pt" fo:letter-spacing="normal" fo:font-style="normal" fo:font-weight="normal" fo:background-color="#ffffff" loext:padding="0.0193in" loext:border="0.06pt solid #000000"/>
    </style:style>
    <style:style style:name="P9" style:family="paragraph" style:parent-style-name="Text_20_body" style:list-style-name="L1">
      <style:paragraph-properties fo:margin-left="0in" fo:margin-right="0in" fo:margin-top="0in" fo:margin-bottom="0in" style:contextual-spacing="false" fo:orphans="65" fo:widows="2" fo:text-indent="0in" style:auto-text-indent="false" fo:padding="0.0193in" fo:border="0.06pt solid #000000"/>
      <style:text-properties fo:font-variant="normal" fo:text-transform="none" style:font-name="Inter" fo:font-size="14pt" fo:letter-spacing="normal" fo:font-style="normal" fo:font-weight="normal" fo:background-color="#ffffff" loext:padding="0.0193in" loext:border="0.06pt solid #000000"/>
    </style:style>
    <style:style style:name="P10" style:family="paragraph" style:parent-style-name="Heading_20_4">
      <style:paragraph-properties fo:margin-left="0in" fo:margin-right="0in" fo:margin-top="0in" fo:margin-bottom="0in" style:contextual-spacing="false" fo:line-height="150%" fo:orphans="65" fo:widows="2" fo:text-indent="0in" style:auto-text-indent="false" fo:padding="0.0193in" fo:border="0.06pt solid #000000"/>
    </style:style>
    <style:style style:name="P11" style:family="paragraph" style:parent-style-name="Text_20_body">
      <style:paragraph-properties fo:margin-left="0in" fo:margin-right="0in" fo:margin-top="0in" fo:margin-bottom="0in" style:contextual-spacing="false" fo:orphans="65" fo:widows="2" fo:text-indent="0in" style:auto-text-indent="false" fo:padding="0.0193in" fo:border="0.06pt solid #000000"/>
      <style:text-properties fo:font-variant="normal" fo:text-transform="none" style:font-name="Inter" fo:font-size="14pt" fo:letter-spacing="normal" fo:font-style="normal" fo:font-weight="normal" fo:background-color="#ffffff" loext:padding="0in" loext:border="none"/>
    </style:style>
    <style:style style:name="P12" style:family="paragraph" style:parent-style-name="Text_20_body">
      <style:paragraph-properties fo:margin-left="0in" fo:margin-right="0in" fo:margin-top="0in" fo:margin-bottom="0in" style:contextual-spacing="false" fo:orphans="65" fo:widows="2" fo:text-indent="0in" style:auto-text-indent="false"/>
      <style:text-properties fo:font-variant="normal" fo:text-transform="none" fo:letter-spacing="normal" fo:background-color="#ffffff" loext:padding="0.0193in" loext:border="0.06pt solid #000000"/>
    </style:style>
    <style:style style:name="P13" style:family="paragraph" style:parent-style-name="Text_20_body">
      <style:paragraph-properties fo:margin-left="0in" fo:margin-right="0in" fo:margin-top="0in" fo:margin-bottom="0in" style:contextual-spacing="false" fo:orphans="65" fo:widows="2" fo:text-indent="0in" style:auto-text-indent="false" fo:padding="0.0193in" fo:border="0.06pt solid #000000"/>
      <style:text-properties fo:font-variant="normal" fo:text-transform="none" fo:letter-spacing="normal" style:text-underline-style="solid" style:text-underline-width="auto" style:text-underline-color="font-color" fo:background-color="#ffffff" loext:padding="0.0193in" loext:border="0.06pt solid #000000"/>
    </style:style>
    <style:style style:name="T1" style:family="text">
      <style:text-properties style:text-underline-style="solid" style:text-underline-width="auto" style:text-underline-color="font-color" loext:padding-left="0in" loext:padding-right="0in" loext:padding-top="0in" loext:padding-bottom="0.0193in" loext:border-left="none" loext:border-right="none" loext:border-top="none" loext:border-bottom="1.5pt solid #000000"/>
    </style:style>
    <style:style style:name="T2" style:family="text">
      <style:text-properties fo:font-size="10.5pt" style:text-underline-style="solid" style:text-underline-width="auto" style:text-underline-color="font-color" loext:padding-left="0in" loext:padding-right="0in" loext:padding-top="0in" loext:padding-bottom="0.0193in" loext:border-left="none" loext:border-right="none" loext:border-top="none" loext:border-bottom="1.5pt solid #000000"/>
    </style:style>
    <style:style style:name="T3" style:family="text">
      <style:text-properties fo:font-variant="normal" fo:text-transform="none" style:text-line-through-style="none" style:text-line-through-type="none" style:font-name="Inter" fo:font-size="14pt" fo:letter-spacing="normal" fo:font-style="normal" style:text-underline-style="none" fo:font-weight="bold" style:text-blinking="false" fo:background-color="#ffffff" loext:char-shading-value="0" loext:padding="0.0193in" loext:border="0.06pt solid #000000"/>
    </style:style>
    <style:style style:name="T4" style:family="text">
      <style:text-properties fo:font-variant="normal" fo:text-transform="none" style:font-name="Inter" fo:font-size="14pt" fo:letter-spacing="normal" fo:font-style="normal" fo:font-weight="normal" fo:background-color="#ffffff" loext:char-shading-value="0" loext:padding="0.0193in" loext:border="0.06pt solid #000000"/>
    </style:style>
    <style:style style:name="T5" style:family="text">
      <style:text-properties fo:font-variant="normal" fo:text-transform="none" style:font-name="Inter" fo:font-size="14pt" fo:letter-spacing="normal" fo:font-style="normal" fo:font-weight="bold" fo:background-color="#ffffff" loext:char-shading-value="0" loext:padding="0.0193in" loext:border="0.06pt solid #000000"/>
    </style:style>
    <style:style style:name="T6" style:family="text">
      <style:text-properties fo:font-variant="normal" fo:text-transform="none" fo:font-family="ui-monospace, SFMono-Regular, Menlo, Monaco, Consolas, 'Liberation Mono', 'Courier New', monospace" fo:font-size="14pt" fo:letter-spacing="normal" fo:font-style="normal" fo:font-weight="normal" fo:background-color="#ffffff" loext:char-shading-value="0" loext:padding-left="0.0417in" loext:padding-right="0in" loext:padding-top="0.0417in" loext:padding-bottom="0.0417in" loext:border-left="0.06pt solid #000000" loext:border-right="none" loext:border-top="0.06pt solid #000000" loext:border-bottom="0.06pt solid #000000"/>
    </style:style>
    <style:style style:name="T7" style:family="text">
      <style:text-properties fo:font-variant="normal" fo:text-transform="none" style:font-name="Inter" fo:font-size="14pt" fo:letter-spacing="normal" fo:font-style="normal" fo:font-weight="normal" fo:background-color="#ffffff" loext:char-shading-value="0" loext:padding="0in" loext:border="none"/>
    </style:style>
    <style:style style:name="T8" style:family="text">
      <style:text-properties fo:font-variant="normal" fo:text-transform="none" fo:letter-spacing="normal" style:text-underline-style="solid" style:text-underline-width="auto" style:text-underline-color="font-color" fo:background-color="#ffffff" loext:char-shading-value="0" loext:padding="0.0193in" loext:border="0.06pt solid #00000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000000"/>
    </style:style>
    <style:style style:name="fr2" style:family="graphic" style:parent-style-name="Graphics">
      <style:graphic-properties fo:margin-left="0in" fo:margin-right="0in" fo:margin-top="0in" fo:margin-bottom="0in" style:vertical-pos="top" style:vertical-rel="baseline" fo:padding-left="0.0193in" fo:padding-right="0in" fo:padding-top="0.0193in" fo:padding-bottom="0.0193in" fo:border-left="0.06pt solid #000000" fo:border-right="none" fo:border-top="0.06pt solid #000000" fo:border-bottom="0.06pt solid #0000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frame-display-scrollbar="false" draw:frame-display-border="false" draw:ole-draw-aspect="1"/>
    </style:style>
    <style:style style:name="fr4"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theodinproject.com/lessons/786/completi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theodinproject.com/dashboard" text:style-name="Internet_20_link" text:visited-style-name="Visited_20_Internet_20_Link"><text:span text:style-name="T1">Dashboard</text:span></text:a><text:a xlink:type="simple" xlink:href="https://www.theodinproject.com/paths" text:style-name="Internet_20_link" text:visited-style-name="Visited_20_Internet_20_Link"><text:span text:style-name="T1">All Paths</text:span></text:a><text:a xlink:type="simple" xlink:href="https://discord.gg/fbFCkYabZB" text:style-name="Internet_20_link" text:visited-style-name="Visited_20_Internet_20_Link"><text:span text:style-name="T1">Community</text:span></text:a><text:a xlink:type="simple" xlink:href="https://www.theodinproject.com/support_us" text:style-name="Internet_20_link" text:visited-style-name="Visited_20_Internet_20_Link"><text:span text:style-name="T2">Support us</text:span></text:a></text:p>
      <text:p text:style-name="P2"><draw:frame draw:style-name="fr1" draw:name="Frame2" text:anchor-type="char" svg:width="0.0161in" draw:z-index="1"><draw:text-box fo:min-height="0.0161in"><text:p text:style-name="P3">Open user menu</text:p></draw:text-box></draw:frame><draw:frame draw:style-name="fr1" draw:name="Frame1" text:anchor-type="char" svg:width="0.0161in" draw:z-index="0"><draw:text-box fo:min-height="0.0161in"><text:p text:style-name="P3">View notifications</text:p></draw:text-box></draw:frame><draw:frame draw:style-name="fr2" draw:name="Image1" text:anchor-type="as-char" svg:width="0.3752in" svg:height="0.3752in" draw:z-index="2"><draw:image xlink:href="Pictures/10000000000001CC000001CC07A0A380.jpg" xlink:type="simple" xlink:show="embed" xlink:actuate="onLoad" draw:mime-type="image/jpeg"/><svg:title>user avatar</svg:title></draw:frame></text:p>
      <text:section text:style-name="Sect1" text:name="flash-messages">
        <text:p text:style-name="P4"/>
      </text:section>
      <text:h text:style-name="P5" text:outline-level="1">Introduction to Flexbox</text:h>
      <text:h text:style-name="P6" text:outline-level="3"><text:a xlink:type="simple" xlink:href="https://www.theodinproject.com/lessons/foundations-introduction-to-flexbox#introduction" text:style-name="Internet_20_link" text:visited-style-name="Visited_20_Internet_20_Link"><text:bookmark text:name="introduction"/><text:span text:style-name="T3">Introduction</text:span></text:a></text:h>
      <text:p text:style-name="P7"><text:span text:style-name="T4">As you’ll learn, there are </text:span><text:span text:style-name="Emphasis"><text:span text:style-name="T4">many</text:span></text:span><text:span text:style-name="T4"> ways to move elements around on a web page. New methods have been developed over the years and older things have fallen out of style. Flexbox was not always available in CSS - its debut was </text:span><text:span text:style-name="Emphasis"><text:span text:style-name="T4">revolutionary</text:span></text:span><text:span text:style-name="T4">.</text:span></text:p>
      <text:p text:style-name="P8">Many resources put it near the end of their curriculum because it is somewhat new as a technology. But at this point, it has become the default way of positioning elements for many developers. Flexbox will be one of the most used tools in your toolbox, so why not learn it first?</text:p>
      <text:h text:style-name="P6" text:outline-level="3"><text:a xlink:type="simple" xlink:href="https://www.theodinproject.com/lessons/foundations-introduction-to-flexbox#lesson-overview" text:style-name="Internet_20_link" text:visited-style-name="Visited_20_Internet_20_Link"><text:bookmark text:name="lesson-overview"/><text:span text:style-name="T3">Lesson overview</text:span></text:a></text:h>
      <text:p text:style-name="P8">This section contains a general overview of topics that you will learn in this lesson.</text:p>
      <text:list text:style-name="L1">
        <text:list-item>
          <text:p text:style-name="P9">You will learn how to position elements using flexbox.</text:p>
        </text:list-item>
        <text:list-item>
          <text:p text:style-name="P9">You will learn about flex containers and flex items.</text:p>
        </text:list-item>
        <text:list-item>
          <text:p text:style-name="P9">You will learn how to create useful components and layouts that go beyond just stacking and centering items.</text:p>
        </text:list-item>
      </text:list>
      <text:h text:style-name="P6" text:outline-level="3"><text:a xlink:type="simple" xlink:href="https://www.theodinproject.com/lessons/foundations-introduction-to-flexbox#before-we-get-started" text:style-name="Internet_20_link" text:visited-style-name="Visited_20_Internet_20_Link"><text:bookmark text:name="before-we-get-started"/><text:soft-page-break/><text:span text:style-name="T3">Before we get started</text:span></text:a></text:h>
      <text:p text:style-name="P7"><text:span text:style-name="T4">Flexbox layouts can get a little complicated. In a previous lesson, you learned how to inspect and debug things using your browser’s developer tools. Those tools will be </text:span><text:span text:style-name="Emphasis"><text:span text:style-name="T4">crucial</text:span></text:span><text:span text:style-name="T4"> for you in the following lessons. If something isn’t behaving the way you expect, inspecting it in the developer tools should be your first step </text:span><text:span text:style-name="Emphasis"><text:span text:style-name="T4">every time</text:span></text:span><text:span text:style-name="T4">.</text:span></text:p>
      <text:p text:style-name="P7"><text:span text:style-name="T4">Flexbox isn’t necessarily any more difficult than the other concepts that we’ve covered so far, but it </text:span><text:span text:style-name="Emphasis"><text:span text:style-name="T4">does</text:span></text:span><text:span text:style-name="T4"> have a few more moving parts. It is going to be somewhat difficult to make use of any of the things you’re learning in these first lessons until you get to the end and can put it all together. As we go, do yourself a favor and </text:span><text:span text:style-name="Strong_20_Emphasis"><text:span text:style-name="T5">play with all of the code examples.</text:span></text:span></text:p>
      <text:p text:style-name="P8">You will almost definitely need to come back and reference these lessons (or a couple of the resources we share with you) when you get to the assignments at the end of the section, but if you take your time and experiment with all the code examples we provide, you’ll know better where to look when that time comes.</text:p>
      <text:h text:style-name="P6" text:outline-level="3"><text:a xlink:type="simple" xlink:href="https://www.theodinproject.com/lessons/foundations-introduction-to-flexbox#lets-flex" text:style-name="Internet_20_link" text:visited-style-name="Visited_20_Internet_20_Link"><text:bookmark text:name="lets-flex"/><text:span text:style-name="T3">Let’s flex!</text:span></text:a></text:h>
      <text:p text:style-name="P8">Flexbox is a way to arrange items into rows or columns. These items will flex (i.e. grow or shrink) based on some rules that you can define. To get started, let’s look at a demonstration.</text:p>
      <text:h text:style-name="P10" text:outline-level="4"><text:a xlink:type="simple" xlink:href="https://www.theodinproject.com/lessons/foundations-introduction-to-flexbox#interactive-codepens" text:style-name="Internet_20_link" text:visited-style-name="Visited_20_Internet_20_Link"><text:bookmark text:name="interactive-codepens"/><text:span text:style-name="T3">Interactive CodePens</text:span></text:a></text:h>
      <text:p text:style-name="P11">We’ve embedded a lot of interactive examples in these lessons. Take your time to experiment with them as you go to cement the concepts in your mind!</text:p>
      <text:p text:style-name="P12"><text:soft-page-break/><draw:frame draw:style-name="fr3" draw:name="Object1" text:anchor-type="as-char" svg:width="6.8335in" svg:height="4.1665in" draw:z-index="3"><draw:floating-frame xlink:href="https://codepen.io/TheOdinProjectExamples/embed/QWgNxrp?height=400&amp;default-tab=html%2Cresult&amp;slug-hash=QWgNxrp&amp;editable=true&amp;user=TheOdinProjectExamples&amp;name=cp_embed_1" xlink:type="simple" xlink:show="embed" xlink:actuate="onLoad" draw:frame-name="cp_embed_1"/></draw:frame></text:p>
      <text:p text:style-name="P7"><text:span text:style-name="T4">We’ll get into exactly what’s going on here soon enough. But for now, let’s uncomment the two flex related CSS declarations in the above Codepen by removing the </text:span><text:span text:style-name="Source_20_Text"><text:span text:style-name="T6">/*</text:span></text:span><text:span text:style-name="T4"> and </text:span><text:span text:style-name="Source_20_Text"><text:span text:style-name="T6">*/</text:span></text:span><text:span text:style-name="T4"> tags surrounding them, then check out the result.</text:span></text:p>
      <text:h text:style-name="P10" text:outline-level="4"><text:a xlink:type="simple" xlink:href="https://www.theodinproject.com/lessons/foundations-introduction-to-flexbox#comments" text:style-name="Internet_20_link" text:visited-style-name="Visited_20_Internet_20_Link"><text:bookmark text:name="comments"/><text:span text:style-name="T3">Comments</text:span></text:a></text:h>
      <text:p text:style-name="P7"><text:span text:style-name="T7">Comments prevent the browser from interpreting lines as code, and are wrapped between specific tags. CSS uses </text:span><text:span text:style-name="Source_20_Text"><text:span text:style-name="T6">/*</text:span></text:span><text:span text:style-name="T7">as an opening comment tag and </text:span><text:span text:style-name="Source_20_Text"><text:span text:style-name="T6">*/</text:span></text:span><text:span text:style-name="T7"> as a closing comment tag, while HTML and JavaScript have their own syntax. Commented out lines of code can be ‘re-enabled’ by removing the comment tags surrounding the code.</text:span></text:p>
      <text:p text:style-name="P8">All 3 divs should now be arranged horizontally. If you resize the results frame with the “1x”, “.5x” and “.25x” buttons you’ll also see that the divs will ‘flex’. They will fill the available area and will each have equal width.</text:p>
      <text:p text:style-name="P7"><text:soft-page-break/><text:span text:style-name="T4">If you add another div to the HTML, inside of </text:span><text:span text:style-name="Source_20_Text"><text:span text:style-name="T6">.flex-container</text:span></text:span><text:span text:style-name="T4">, it will show up alongside the others, and everything will flex to fit within the available area.</text:span></text:p>
      <text:h text:style-name="P10" text:outline-level="4"><text:a xlink:type="simple" xlink:href="https://www.theodinproject.com/lessons/foundations-introduction-to-flexbox#opening-codepens-externally" text:style-name="Internet_20_link" text:visited-style-name="Visited_20_Internet_20_Link"><text:bookmark text:name="opening-codepens-externally"/><text:span text:style-name="T3">Opening CodePens externally</text:span></text:a></text:h>
      <text:p text:style-name="P11">If it’s hard to see what’s going on in the small embedded CodePen, feel free to click the “Edit on CodePen” or “Fork on CodePen” button. This will bring the example into a full-sized environment. Some of the later examples might especially benefit from doing this.</text:p>
      <text:h text:style-name="P10" text:outline-level="4"><text:a xlink:type="simple" xlink:href="https://www.theodinproject.com/lessons/foundations-introduction-to-flexbox#flex-containers-and-flex-items" text:style-name="Internet_20_link" text:visited-style-name="Visited_20_Internet_20_Link"><text:bookmark text:name="flex-containers-and-flex-items"/><text:span text:style-name="T3">Flex containers and flex items</text:span></text:a></text:h>
      <text:p text:style-name="P7"><text:span text:style-name="T4">As you’ve seen, flexbox is not just a single CSS property but a whole toolbox of properties that you can use to put things where you need them. Some of these properties belong on the </text:span><text:span text:style-name="Emphasis"><text:span text:style-name="T4">flex container</text:span></text:span><text:span text:style-name="T4">, while some go on the </text:span><text:span text:style-name="Emphasis"><text:span text:style-name="T4">flex items</text:span></text:span><text:span text:style-name="T4">. This is an important concept.</text:span></text:p>
      <text:p text:style-name="P7"><text:bookmark text:name="flex-container-item-knowledge-check"/><text:span text:style-name="T4">A flex container is any element that has </text:span><text:span text:style-name="Source_20_Text"><text:span text:style-name="T6">display: flex</text:span></text:span><text:span text:style-name="T4"> on it. A flex item is any element that lives directly inside of a flex container.</text:span></text:p>
      <text:p text:style-name="P13"><draw:a xlink:type="simple" xlink:href="https://cdn.statically.io/gh/TheOdinProject/curriculum/b2a53579fcbec1cfde47646cc5a2b109cd7772cc/foundations/html_css/flexbox/imgs/03.png"><draw:frame draw:style-name="fr4" draw:name="Image2" text:anchor-type="as-char" svg:width="9.448in" svg:height="2.8752in" draw:z-index="4"><draw:image xlink:href="https://cdn.statically.io/gh/TheOdinProject/curriculum/b2a53579fcbec1cfde47646cc5a2b109cd7772cc/foundations/html_css/flexbox/imgs/03.png" xlink:type="simple" xlink:show="embed" xlink:actuate="onLoad" draw:mime-type="image/png"/><svg:title>container-vs-child</svg:title></draw:frame></draw:a><text:bookmark text:name="how-to-create-flex-item-knowledge-check"/></text:p>
      <text:p text:style-name="P7"><text:span text:style-name="T4">Somewhat confusingly, any element can be both a flex container </text:span><text:span text:style-name="Emphasis"><text:span text:style-name="T4">and</text:span></text:span><text:span text:style-name="T4"> a flex item. Said another way, you can also put </text:span><text:span text:style-name="Source_20_Text"><text:span text:style-name="T6">display: flex</text:span></text:span><text:span text:style-name="T4"> on a flex item and then use flexbox to arrange </text:span><text:span text:style-name="Emphasis"><text:span text:style-name="T4">its</text:span></text:span><text:span text:style-name="T4"> children.</text:span></text:p>
      <text:p text:style-name="P13"><text:soft-page-break/><draw:a xlink:type="simple" xlink:href="https://cdn.statically.io/gh/TheOdinProject/curriculum/495704c6eb6bf33bc927534f231533a82b27b2ac/html_css/v2/foundations/flexbox/imgs/04.png"><draw:frame draw:style-name="fr4" draw:name="Image3" text:anchor-type="as-char" svg:width="8.6874in" svg:height="3in" draw:z-index="5"><draw:image xlink:href="https://cdn.statically.io/gh/TheOdinProject/curriculum/495704c6eb6bf33bc927534f231533a82b27b2ac/html_css/v2/foundations/flexbox/imgs/04.png" xlink:type="simple" xlink:show="embed" xlink:actuate="onLoad" draw:mime-type="image/png"/><svg:title>nesting flex containers</svg:title></draw:frame></draw:a></text:p>
      <text:p text:style-name="P7"><text:span text:style-name="T4">Creating and nesting multiple flex containers and items is the primary way we will be building up complex layouts. The following image was achieved using </text:span><text:span text:style-name="Emphasis"><text:span text:style-name="T4">only</text:span></text:span><text:span text:style-name="T4"> flexbox to arrange, size, and place the various elements. Flexbox is a </text:span><text:span text:style-name="Emphasis"><text:span text:style-name="T4">very</text:span></text:span><text:span text:style-name="T4"> powerful tool.</text:span></text:p>
      <text:p text:style-name="P7"><text:span text:style-name="T8"><draw:a xlink:type="simple" xlink:href="https://cdn.statically.io/gh/TheOdinProject/curriculum/1c08f76bfc94871a3e01bcc2488c82519335b5cd/foundations/html_css/flexbox/imgs/05.png"><draw:frame draw:style-name="fr4" draw:name="Image4" text:anchor-type="as-char" svg:width="7.6354in" svg:height="4.9272in" draw:z-index="6"><draw:image xlink:href="https://cdn.statically.io/gh/TheOdinProject/curriculum/1c08f76bfc94871a3e01bcc2488c82519335b5cd/foundations/html_css/flexbox/imgs/05.png" xlink:type="simple" xlink:show="embed" xlink:actuate="onLoad" draw:mime-type="image/png"/><svg:title>complex example</svg:title></draw:frame></draw: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15:17:35.444765984</meta:creation-date>
    <dc:date>2026-06-13T15:18:48.467004095</dc:date>
    <meta:editing-duration>PT1M14S</meta:editing-duration>
    <meta:editing-cycles>1</meta:editing-cycles>
    <meta:document-statistic meta:table-count="0" meta:image-count="4" meta:object-count="1" meta:page-count="5" meta:paragraph-count="37" meta:word-count="787" meta:character-count="4432" meta:non-whitespace-character-count="3680"/>
    <meta:generator>LibreOffice/26.2.4.2$Linux_X86_64 LibreOffice_project/c44d3140fc62714965bf5d98735e0d79ba4b1ebd</meta:generator>
  </office:meta>
</office:document-meta>
</file>