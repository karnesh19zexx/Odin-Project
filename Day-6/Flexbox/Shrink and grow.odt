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8000000E882839E7C.png" manifest:media-type="image/png"/>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in" style:contextual-spacing="false" fo:line-height="120%" fo:text-indent="0in" style:auto-text-indent="false" fo:padding="0.0193in" fo:border="0.06pt solid #000000"/>
      <style:text-properties fo:font-size="22.5pt" fo:font-weight="bold" loext:padding="0.0193in" loext:border="0.06pt solid #000000"/>
    </style:style>
    <style:style style:name="P2" style:family="paragraph" style:parent-style-name="Heading_20_3">
      <style:paragraph-properties fo:margin-left="0in" fo:margin-right="0in" fo:margin-top="0in" fo:margin-bottom="0in" style:contextual-spacing="false" fo:line-height="160%" fo:orphans="65" fo:text-indent="0in" style:auto-text-indent="false" fo:padding="0.0193in" fo:border="0.06pt solid #000000"/>
    </style:style>
    <style:style style:name="P3" style:family="paragraph" style:parent-style-name="Text_20_body">
      <style:paragraph-properties fo:margin-left="0in" fo:margin-right="0in" fo:margin-top="0in" fo:margin-bottom="0in" style:contextual-spacing="false" fo:orphans="65" fo:text-indent="0in" style:auto-text-indent="false" fo:padding="0.0193in" fo:border="0.06pt solid #000000"/>
    </style:style>
    <style:style style:name="P4" style:family="paragraph" style:parent-style-name="Text_20_body">
      <style:paragraph-properties fo:margin-left="0in" fo:margin-right="0in" fo:margin-top="0in" fo:margin-bottom="0in" style:contextual-spacing="false" fo:orphans="65" fo:text-indent="0in" style:auto-text-indent="false" fo:padding="0.0193in" fo:border="0.06pt solid #000000"/>
      <style:text-properties loext:padding="0.0193in" loext:border="0.06pt solid #000000"/>
    </style:style>
    <style:style style:name="P5" style:family="paragraph" style:parent-style-name="Text_20_body" style:list-style-name="L1">
      <style:paragraph-properties fo:margin-left="0in" fo:margin-right="0in" fo:margin-top="0in" fo:margin-bottom="0in" style:contextual-spacing="false" fo:orphans="65" fo:text-indent="0in" style:auto-text-indent="false" fo:padding="0.0193in" fo:border="0.06pt solid #000000"/>
    </style:style>
    <style:style style:name="P6" style:family="paragraph" style:parent-style-name="Quotations">
      <style:paragraph-properties fo:margin-left="0in" fo:margin-right="0in" fo:margin-top="0in" fo:margin-bottom="0in" style:contextual-spacing="false" fo:orphans="65" fo:text-indent="0in" style:auto-text-indent="false" fo:padding="0.0193in" fo:border="0.06pt solid #000000"/>
      <style:text-properties fo:font-style="italic" fo:font-weight="bold" loext:padding="0.0193in" loext:border="0.06pt solid #000000"/>
    </style:style>
    <style:style style:name="P7" style:family="paragraph" style:parent-style-name="Quotations">
      <style:paragraph-properties fo:margin-left="0in" fo:margin-right="0in" fo:margin-top="0in" fo:margin-bottom="0in" style:contextual-spacing="false" fo:orphans="65" fo:text-indent="0in" style:auto-text-indent="false" fo:padding="0.0193in" fo:border="0.06pt solid #000000"/>
    </style:style>
    <style:style style:name="P8" style:family="paragraph" style:parent-style-name="Text_20_body">
      <style:paragraph-properties fo:margin-left="0in" fo:margin-right="0in" fo:margin-top="0in" fo:margin-bottom="0in" style:contextual-spacing="false" fo:orphans="65" fo:text-indent="0in" style:auto-text-indent="false" fo:padding="0.0193in" fo:border="0.06pt solid #000000"/>
      <style:text-properties style:text-underline-style="solid" style:text-underline-width="auto" style:text-underline-color="font-color" loext:padding="0.0193in" loext:border="0.06pt solid #000000"/>
    </style:style>
    <style:style style:name="P9" style:family="paragraph" style:parent-style-name="Heading_20_4">
      <style:paragraph-properties fo:margin-left="0in" fo:margin-right="0in" fo:margin-top="0in" fo:margin-bottom="0in" style:contextual-spacing="false" fo:line-height="150%" fo:orphans="65" fo:text-indent="0in" style:auto-text-indent="false" fo:padding="0.0193in" fo:border="0.06pt solid #000000"/>
    </style:style>
    <style:style style:name="P10" style:family="paragraph" style:parent-style-name="Text_20_body">
      <style:paragraph-properties fo:margin-left="0in" fo:margin-right="0in" fo:margin-top="0in" fo:margin-bottom="0in" style:contextual-spacing="false" fo:orphans="65" fo:text-indent="0in" style:auto-text-indent="false"/>
      <style:text-properties loext:padding="0.0193in" loext:border="0.06pt solid #000000"/>
    </style:style>
    <style:style style:name="T1" style:family="text">
      <style:text-properties style:text-line-through-style="none" style:text-line-through-type="none" style:text-underline-style="none" fo:font-weight="bold" style:text-blinking="false" loext:padding="0.0193in" loext:border="0.06pt solid #000000"/>
    </style:style>
    <style:style style:name="T2" style:family="text">
      <style:text-properties loext:padding="0.0193in" loext:border="0.06pt solid #000000"/>
    </style:style>
    <style:style style:name="T3" style:family="text">
      <style:text-properties fo:font-family="ui-monospace, SFMono-Regular, Menlo, Monaco, Consolas, 'Liberation Mono', 'Courier New', monospace" fo:font-weight="normal" loext:padding-left="0.0417in" loext:padding-right="0in" loext:padding-top="0.0417in" loext:padding-bottom="0.0417in" loext:border-left="0.06pt solid #000000" loext:border-right="none" loext:border-top="0.06pt solid #000000" loext:border-bottom="0.06pt solid #000000"/>
    </style:style>
    <style:style style:name="T4" style:family="text">
      <style:text-properties fo:font-style="italic" fo:font-weight="bold" loext:padding="0.0193in" loext:border="0.06pt solid #000000"/>
    </style:style>
    <style:style style:name="T5" style:family="text">
      <style:text-properties fo:font-style="italic" style:text-underline-style="solid" style:text-underline-width="auto" style:text-underline-color="font-color" fo:font-weight="bold" loext:padding="0.0193in" loext:border="0.06pt solid #000000"/>
    </style:style>
    <style:style style:name="T6"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scrollbar="false" draw:frame-display-border="false" draw:ole-draw-aspect="1"/>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rowing and Shrinking</text:h>
      <text:h text:style-name="P2" text:outline-level="3"><text:a xlink:type="simple" xlink:href="https://www.theodinproject.com/lessons/foundations-growing-and-shrinking#introduction" text:style-name="Internet_20_link" text:visited-style-name="Visited_20_Internet_20_Link"><text:bookmark text:name="introduction"/><text:span text:style-name="T1">Introduction</text:span></text:a></text:h>
      <text:p text:style-name="P3"><text:span text:style-name="T2">Let’s look a little closer at what actually happened when you put </text:span><text:span text:style-name="Source_20_Text"><text:span text:style-name="T3">flex: 1</text:span></text:span><text:span text:style-name="T2"> on those flex items in the last lesson.</text:span></text:p>
      <text:h text:style-name="P2" text:outline-level="3"><text:a xlink:type="simple" xlink:href="https://www.theodinproject.com/lessons/foundations-growing-and-shrinking#lesson-overview" text:style-name="Internet_20_link" text:visited-style-name="Visited_20_Internet_20_Link"><text:bookmark text:name="lesson-overview"/><text:span text:style-name="T1">Lesson overview</text:span></text:a></text:h>
      <text:p text:style-name="P4">This section contains a general overview of topics that you will learn in this lesson.</text:p>
      <text:list text:style-name="L1">
        <text:list-item>
          <text:p text:style-name="P5"><text:span text:style-name="T2">You’ll learn the 3 properties that are defined by the </text:span><text:span text:style-name="Source_20_Text"><text:span text:style-name="T3">flex</text:span></text:span><text:span text:style-name="T2"> shorthand, and how to use them individually.</text:span></text:p>
        </text:list-item>
      </text:list>
      <text:h text:style-name="P2" text:outline-level="3"><text:a xlink:type="simple" xlink:href="https://www.theodinproject.com/lessons/foundations-growing-and-shrinking#the-flex-shorthand" text:style-name="Internet_20_link" text:visited-style-name="Visited_20_Internet_20_Link"><text:bookmark text:name="the-flex-shorthand"/><text:span text:style-name="T1">The flex shorthand</text:span></text:a></text:h>
      <text:p text:style-name="P3"><text:span text:style-name="T2">The </text:span><text:span text:style-name="Source_20_Text"><text:span text:style-name="T3">flex</text:span></text:span><text:span text:style-name="T2"> declaration is actually a shorthand for 3 properties that you can set on a flex item. These properties affect how flex items size themselves within their container. You’ve seen some shorthand properties before, but we haven’t officially defined them yet.</text:span></text:p>
      <text:p text:style-name="P6">Shorthand properties are CSS properties that let you set the values of multiple other CSS properties simultaneously. Using a shorthand property, you can write more concise (and often more readable) stylesheets, saving time and energy.</text:p>
      <text:p text:style-name="P7"><text:span text:style-name="T4">Source: </text:span><text:a xlink:type="simple" xlink:href="https://developer.mozilla.org/en-US/docs/Web/CSS/Shorthand_properties" text:style-name="Internet_20_link" text:visited-style-name="Visited_20_Internet_20_Link"><text:span text:style-name="T5">Shorthand properties on MDN</text:span></text:a></text:p>
      <text:p text:style-name="P3"><text:span text:style-name="T2">In this case, </text:span><text:span text:style-name="Source_20_Text"><text:span text:style-name="T3">flex</text:span></text:span><text:span text:style-name="T2"> is actually a shorthand for </text:span><text:span text:style-name="Source_20_Text"><text:span text:style-name="T3">flex-grow</text:span></text:span><text:span text:style-name="T2">, </text:span><text:span text:style-name="Source_20_Text"><text:span text:style-name="T3">flex-shrink</text:span></text:span><text:span text:style-name="T2"> and </text:span><text:span text:style-name="Source_20_Text"><text:span text:style-name="T3">flex-basis</text:span></text:span><text:span text:style-name="T2">.</text:span></text:p>
      <text:p text:style-name="P8"><draw:a xlink:type="simple" xlink:href="https://cdn.statically.io/gh/TheOdinProject/curriculum/0cc6b26bb0c4b94524369d327c97a8fb11e83b6b/foundations/html_css/flexbox/imgs/10.png"><draw:frame draw:style-name="fr1" draw:name="Image1" text:anchor-type="as-char" svg:width="5.6866in" svg:height="3.2425in" draw:z-index="0"><draw:image xlink:href="Pictures/1000000000000198000000E882839E7C.png" xlink:type="simple" xlink:show="embed" xlink:actuate="onLoad" draw:mime-type="image/png"/><svg:title>flex shorthand</svg:title></draw:frame></draw:a></text:p>
      <text:p text:style-name="P3"><text:span text:style-name="T2">In the above screenshot, </text:span><text:span text:style-name="Source_20_Text"><text:span text:style-name="T3">flex: 1</text:span></text:span><text:span text:style-name="T2"> equates to: </text:span><text:span text:style-name="Source_20_Text"><text:span text:style-name="T3">flex-grow: 1</text:span></text:span><text:span text:style-name="T2">, </text:span><text:span text:style-name="Source_20_Text"><text:span text:style-name="T3">flex-shrink: 1</text:span></text:span><text:span text:style-name="T2">, </text:span><text:span text:style-name="Source_20_Text"><text:span text:style-name="T3">flex-basis: 0</text:span></text:span><text:span text:style-name="T2">.</text:span></text:p>
      <text:h text:style-name="P9" text:outline-level="4"><text:a xlink:type="simple" xlink:href="https://www.theodinproject.com/lessons/foundations-growing-and-shrinking#flex-grow" text:style-name="Internet_20_link" text:visited-style-name="Visited_20_Internet_20_Link"><text:bookmark text:name="flex-grow"/><text:soft-page-break/><text:span text:style-name="T1">Flex-grow</text:span></text:a></text:h>
      <text:p text:style-name="P3"><text:span text:style-name="Source_20_Text"><text:span text:style-name="T3">flex-grow</text:span></text:span><text:span text:style-name="T2"> expects a single number as its value, and that number is used as the flex-item’s “growth factor”. When we applied </text:span><text:span text:style-name="Source_20_Text"><text:span text:style-name="T3">flex: 1</text:span></text:span><text:span text:style-name="T2"> to every div inside our container, we were telling every div to grow the same amount. The result of this is that every div ends up the exact same size. If we instead add </text:span><text:span text:style-name="Source_20_Text"><text:span text:style-name="T3">flex: 2</text:span></text:span><text:span text:style-name="T2"> to just one of the divs, then that div would grow to 2x the size of the others.</text:span></text:p>
      <text:p text:style-name="P3"><text:span text:style-name="T2">In the following example the </text:span><text:span text:style-name="Source_20_Text"><text:span text:style-name="T3">flex</text:span></text:span><text:span text:style-name="T2"> shorthand has values for </text:span><text:span text:style-name="Source_20_Text"><text:span text:style-name="T3">flex-shrink</text:span></text:span><text:span text:style-name="T2"> and </text:span><text:span text:style-name="Source_20_Text"><text:span text:style-name="T3">flex-basis</text:span></text:span><text:span text:style-name="T2"> specified with their default values.</text:span></text:p>
      <text:p text:style-name="P10"><draw:frame draw:style-name="fr2" draw:name="Object1" text:anchor-type="as-char" svg:width="6.8335in" svg:height="3.1252in" draw:z-index="1"><draw:floating-frame xlink:href="https://codepen.io/TheOdinProjectExamples/embed/YzQqvgK?height=300&amp;default-tab=html%2Cresult&amp;slug-hash=YzQqvgK&amp;editable=true&amp;user=TheOdinProjectExamples&amp;name=cp_embed_1" xlink:type="simple" xlink:show="embed" xlink:actuate="onLoad" draw:frame-name="cp_embed_1"/></draw:frame></text:p>
      <text:h text:style-name="P9" text:outline-level="4"><text:a xlink:type="simple" xlink:href="https://www.theodinproject.com/lessons/foundations-growing-and-shrinking#flex-shrink" text:style-name="Internet_20_link" text:visited-style-name="Visited_20_Internet_20_Link"><text:bookmark text:name="flex-shrink"/><text:span text:style-name="T1">Flex-shrink</text:span></text:a></text:h>
      <text:p text:style-name="P3"><text:span text:style-name="Source_20_Text"><text:span text:style-name="T3">flex-shrink</text:span></text:span><text:span text:style-name="T2"> is similar to </text:span><text:span text:style-name="Source_20_Text"><text:span text:style-name="T3">flex-grow</text:span></text:span><text:span text:style-name="T2">, but sets the “shrink factor” of a flex item. </text:span><text:span text:style-name="Source_20_Text"><text:span text:style-name="T3">flex-shrink</text:span></text:span><text:span text:style-name="T2"> only ends up being applied if the size of all flex items is larger than their parent container. For example, if our 3 divs from above had a width declaration like: </text:span><text:span text:style-name="Source_20_Text"><text:span text:style-name="T3">width: 100px</text:span></text:span><text:span text:style-name="T2">, and </text:span><text:span text:style-name="Source_20_Text"><text:span text:style-name="T3">.flex-container</text:span></text:span><text:span text:style-name="T2"> was smaller than </text:span><text:span text:style-name="Source_20_Text"><text:span text:style-name="T3">300px</text:span></text:span><text:span text:style-name="T2">, our divs would have to shrink to fit.</text:span></text:p>
      <text:p text:style-name="P3"><text:span text:style-name="T2">The default shrink factor is </text:span><text:span text:style-name="Source_20_Text"><text:span text:style-name="T3">flex-shrink: 1</text:span></text:span><text:span text:style-name="T2">, which means all items will shrink evenly. If you do </text:span><text:span text:style-name="Emphasis"><text:span text:style-name="T2">not</text:span></text:span><text:span text:style-name="T2"> want an item to shrink then you can specify </text:span><text:span text:style-name="Source_20_Text"><text:span text:style-name="T3">flex-shrink: 0;</text:span></text:span><text:span text:style-name="T2">. You can also specify higher numbers to make certain items shrink at a higher rate than normal.</text:span></text:p>
      <text:p text:style-name="P3"><text:soft-page-break/><text:span text:style-name="T2">Here’s an example. Note that we’ve also changed the </text:span><text:span text:style-name="Source_20_Text"><text:span text:style-name="T3">flex-basis</text:span></text:span><text:span text:style-name="T2"> for reasons that will be explained shortly. If you shrink your browser window you’ll notice that </text:span><text:span text:style-name="Source_20_Text"><text:span text:style-name="T3">.two</text:span></text:span><text:span text:style-name="T2"> never gets smaller than the given width of 250px, even though the </text:span><text:span text:style-name="Source_20_Text"><text:span text:style-name="T3">flex-grow</text:span></text:span><text:span text:style-name="T2"> rule would otherwise specify that each element should be equally sized.</text:span></text:p>
      <text:p text:style-name="P10"><draw:frame draw:style-name="fr2" draw:name="Object2" text:anchor-type="as-char" svg:width="6.8335in" svg:height="3.1252in" draw:z-index="2"><draw:floating-frame xlink:href="https://codepen.io/TheOdinProjectExamples/embed/JjJXZVz?height=300&amp;default-tab=html%2Cresult&amp;slug-hash=JjJXZVz&amp;editable=true&amp;user=TheOdinProjectExamples&amp;name=cp_embed_2" xlink:type="simple" xlink:show="embed" xlink:actuate="onLoad" draw:frame-name="cp_embed_2"/></draw:frame></text:p>
      <text:p text:style-name="P3"><text:span text:style-name="T2">An important implication to notice here is that when you specify </text:span><text:span text:style-name="Source_20_Text"><text:span text:style-name="T3">flex-grow</text:span></text:span><text:span text:style-name="T2"> or </text:span><text:span text:style-name="Source_20_Text"><text:span text:style-name="T3">flex-shrink</text:span></text:span><text:span text:style-name="T2">, flex items do not necessarily respect your given values for </text:span><text:span text:style-name="Source_20_Text"><text:span text:style-name="T3">width</text:span></text:span><text:span text:style-name="T2">. In the above example, all 3 divs are given a width of 250px, but when their parent is big enough, they grow to fill it. Likewise, when the parent is too small, the default behavior is for them to shrink to fit. This is not a bug, but it could be confusing behavior if you aren’t expecting it.</text:span></text:p>
      <text:h text:style-name="P9" text:outline-level="4"><text:a xlink:type="simple" xlink:href="https://www.theodinproject.com/lessons/foundations-growing-and-shrinking#flex-basis" text:style-name="Internet_20_link" text:visited-style-name="Visited_20_Internet_20_Link"><text:bookmark text:name="flex-basis"/><text:span text:style-name="T1">Flex-basis</text:span></text:a></text:h>
      <text:p text:style-name="P3"><text:span text:style-name="Source_20_Text"><text:span text:style-name="T3">flex-basis</text:span></text:span><text:span text:style-name="T2"> sets the initial size of a flex item, so any sort of </text:span><text:span text:style-name="Source_20_Text"><text:span text:style-name="T3">flex-grow</text:span></text:span><text:span text:style-name="T2">ing or </text:span><text:span text:style-name="Source_20_Text"><text:span text:style-name="T3">flex-shrink</text:span></text:span><text:span text:style-name="T2">ing starts from that baseline size. The shorthand value defaults to </text:span><text:span text:style-name="Source_20_Text"><text:span text:style-name="T3">flex-basis: 0%</text:span></text:span><text:span text:style-name="T2">. The reason we had to change it to </text:span><text:span text:style-name="Source_20_Text"><text:span text:style-name="T3">auto</text:span></text:span><text:span text:style-name="T2"> in the </text:span><text:span text:style-name="Source_20_Text"><text:span text:style-name="T3">flex-shrink</text:span></text:span><text:span text:style-name="T2"> example is that with the basis set to </text:span><text:span text:style-name="Source_20_Text"><text:span text:style-name="T3">0</text:span></text:span><text:span text:style-name="T2">, those items would ignore the item’s width, and everything would shrink evenly. Using </text:span><text:span text:style-name="Source_20_Text"><text:span text:style-name="T3">auto</text:span></text:span><text:span text:style-name="T2"> as a flex-basis tells the item to check for a width declaration (</text:span><text:span text:style-name="Source_20_Text"><text:span text:style-name="T3">width: 250px</text:span></text:span><text:span text:style-name="T2">).</text:span></text:p>
      <text:h text:style-name="P9" text:outline-level="4"><text:a xlink:type="simple" xlink:href="https://www.theodinproject.com/lessons/foundations-growing-and-shrinking#important-note-about-flex-basis" text:style-name="Internet_20_link" text:visited-style-name="Visited_20_Internet_20_Link"><text:bookmark text:name="important-note-about-flex-basis"/><text:soft-page-break/><text:span text:style-name="T1">Important note about flex-basis</text:span></text:a></text:h>
      <text:p text:style-name="P3"><text:span text:style-name="T6">There is a difference between the default value of </text:span><text:span text:style-name="Source_20_Text"><text:span text:style-name="T3">flex-basis</text:span></text:span><text:span text:style-name="T6"> and the way the </text:span><text:span text:style-name="Source_20_Text"><text:span text:style-name="T3">flex</text:span></text:span><text:span text:style-name="T6"> shorthand defines it if no </text:span><text:span text:style-name="Source_20_Text"><text:span text:style-name="T3">flex-basis</text:span></text:span><text:span text:style-name="T6"> is given. The actual default value for </text:span><text:span text:style-name="Source_20_Text"><text:span text:style-name="T3">flex-basis</text:span></text:span><text:span text:style-name="T6"> is </text:span><text:span text:style-name="Source_20_Text"><text:span text:style-name="T3">auto</text:span></text:span><text:span text:style-name="T6">, but when you specify </text:span><text:span text:style-name="Source_20_Text"><text:span text:style-name="T3">flex: 1</text:span></text:span><text:span text:style-name="T6"> on an element, it interprets that as </text:span><text:span text:style-name="Source_20_Text"><text:span text:style-name="T3">flex: 1 1 0</text:span></text:span><text:span text:style-name="T6">. If you want to </text:span><text:span text:style-name="Emphasis"><text:span text:style-name="T2">only</text:span></text:span><text:span text:style-name="T6"> adjust an item’s </text:span><text:span text:style-name="Source_20_Text"><text:span text:style-name="T3">flex-grow</text:span></text:span><text:span text:style-name="T6"> you can do so directly, without the shorthand. Or you can be more verbose and use the full 3 value shorthand </text:span><text:span text:style-name="Source_20_Text"><text:span text:style-name="T3">flex: 1 1 auto</text:span></text:span><text:span text:style-name="T6">, which is also equivalent to using </text:span><text:span text:style-name="Source_20_Text"><text:span text:style-name="T3">flex: auto</text:span></text:span><text:span text:style-name="T6">.</text:span></text:p>
      <text:h text:style-name="P9" text:outline-level="4"><text:a xlink:type="simple" xlink:href="https://www.theodinproject.com/lessons/foundations-growing-and-shrinking#what-is-flex-auto" text:style-name="Internet_20_link" text:visited-style-name="Visited_20_Internet_20_Link"><text:bookmark text:name="what-is-flex-auto"/><text:span text:style-name="T1">What is flex auto?</text:span></text:a></text:h>
      <text:p text:style-name="P3"><text:span text:style-name="T2">If you noticed, we mentioned a new flex shorthand </text:span><text:span text:style-name="Source_20_Text"><text:span text:style-name="T3">flex: auto</text:span></text:span><text:span text:style-name="T2"> in the previous note. However we didn’t fully introduce it. </text:span><text:span text:style-name="Source_20_Text"><text:span text:style-name="T3">flex: auto</text:span></text:span><text:span text:style-name="T2"> is one of the shorthands of flex. When </text:span><text:span text:style-name="Source_20_Text"><text:span text:style-name="T3">auto</text:span></text:span><text:span text:style-name="T2"> is defined as a flex keyword it is equivalent to the values of </text:span><text:span text:style-name="Source_20_Text"><text:span text:style-name="T3">flex-grow: 1</text:span></text:span><text:span text:style-name="T2">, </text:span><text:span text:style-name="Source_20_Text"><text:span text:style-name="T3">flex-shrink: 1</text:span></text:span><text:span text:style-name="T2"> and </text:span><text:span text:style-name="Source_20_Text"><text:span text:style-name="T3">flex-basis: auto</text:span></text:span><text:span text:style-name="T2"> or to </text:span><text:span text:style-name="Source_20_Text"><text:span text:style-name="T3">flex: 1 1 auto</text:span></text:span><text:span text:style-name="T2"> using the flex shorthand. Note that </text:span><text:span text:style-name="Source_20_Text"><text:span text:style-name="T3">flex: auto</text:span></text:span><text:span text:style-name="T2"> is not the default value when using the flex shorthand despite the name being “auto” which may be slightly confusing at first. You will encounter and learn more about </text:span><text:span text:style-name="Source_20_Text"><text:span text:style-name="T3">flex: auto</text:span></text:span><text:span text:style-name="T2"> and its potential use-cases when reading through the assignment section.</text:span></text:p>
      <text:h text:style-name="P9" text:outline-level="4"><text:a xlink:type="simple" xlink:href="https://www.theodinproject.com/lessons/foundations-growing-and-shrinking#in-practice" text:style-name="Internet_20_link" text:visited-style-name="Visited_20_Internet_20_Link"><text:bookmark text:name="in-practice"/><text:span text:style-name="T1">In practice</text:span></text:a></text:h>
      <text:p text:style-name="P3"><text:span text:style-name="T2">In practice you will likely not be using complex values for </text:span><text:span text:style-name="Source_20_Text"><text:span text:style-name="T3">flex-grow</text:span></text:span><text:span text:style-name="T2">, </text:span><text:span text:style-name="Source_20_Text"><text:span text:style-name="T3">flex-shrink</text:span></text:span><text:span text:style-name="T2"> or </text:span><text:span text:style-name="Source_20_Text"><text:span text:style-name="T3">flex-basis</text:span></text:span><text:span text:style-name="T2">. Generally, you’re most likely to use declarations like </text:span><text:span text:style-name="Source_20_Text"><text:span text:style-name="T3">flex: 1;</text:span></text:span><text:span text:style-name="T2"> to make divs grow evenly and </text:span><text:span text:style-name="Source_20_Text"><text:span text:style-name="T3">flex-shrink: 0</text:span></text:span><text:span text:style-name="T2"> to keep certain divs from shrinking.</text:span></text:p>
      <text:p text:style-name="P3"><text:span text:style-name="T2">It </text:span><text:span text:style-name="Emphasis"><text:span text:style-name="T2">is</text:span></text:span><text:span text:style-name="T2"> possible to get fancy, and set up layouts where some columns relate to each other in a specific ratio, so it’s useful to know that you can use other values, but those are relatively rare.</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15:19:38.946745168</meta:creation-date>
    <dc:date>2026-06-13T15:19:45.083944408</dc:date>
    <meta:editing-duration>PT7S</meta:editing-duration>
    <meta:editing-cycles>1</meta:editing-cycles>
    <meta:generator>LibreOffice/26.2.4.2$Linux_X86_64 LibreOffice_project/c44d3140fc62714965bf5d98735e0d79ba4b1ebd</meta:generator>
    <meta:document-statistic meta:table-count="0" meta:image-count="1" meta:object-count="2" meta:page-count="4" meta:paragraph-count="33" meta:word-count="874" meta:character-count="5009" meta:non-whitespace-character-count="4164"/>
  </office:meta>
</office:document-meta>
</file>