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nter" svg:font-family="Inter,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72afb" officeooo:paragraph-rsid="00172afb"/>
    </style:style>
    <style:style style:name="P2" style:family="paragraph" style:parent-style-name="Heading_20_4">
      <style:text-properties officeooo:rsid="00172afb" officeooo:paragraph-rsid="00172afb"/>
    </style:style>
    <style:style style:name="P3" style:family="paragraph" style:parent-style-name="Text_20_body">
      <style:paragraph-properties fo:margin-left="0in" fo:margin-right="0in" fo:margin-top="0in" fo:margin-bottom="0in" style:contextual-spacing="false" fo:orphans="2" fo:widows="2" fo:text-indent="0in" style:auto-text-indent="false" fo:padding="0.0193in" fo:border="0.06pt solid #000000"/>
      <style:text-properties officeooo:rsid="00172afb"/>
    </style:style>
    <style:style style:name="P4" style:family="paragraph" style:parent-style-name="Text_20_body">
      <style:paragraph-properties fo:margin-left="0in" fo:margin-right="0in" fo:orphans="2" fo:widows="2" fo:text-indent="0in" style:auto-text-indent="false" fo:padding="0.0193in" fo:border="0.06pt solid #000000"/>
      <style:text-properties fo:font-variant="normal" fo:text-transform="none" style:font-name="Inter" fo:font-size="12pt" fo:letter-spacing="normal" fo:font-style="normal" fo:font-weight="normal" officeooo:rsid="00172afb"/>
    </style:style>
    <style:style style:name="P5" style:family="paragraph" style:parent-style-name="Heading_20_4">
      <style:paragraph-properties fo:margin-left="0in" fo:margin-right="0in" fo:margin-top="0in" fo:margin-bottom="0in" style:contextual-spacing="false" fo:line-height="150%" fo:orphans="2" fo:widows="2" fo:text-indent="0in" style:auto-text-indent="false" fo:padding="0.0193in" fo:border="0.06pt solid #000000"/>
      <style:text-properties officeooo:rsid="00172afb"/>
    </style:style>
    <style:style style:name="P6" style:family="paragraph" style:parent-style-name="Text_20_body">
      <style:paragraph-properties fo:margin-left="0in" fo:margin-right="0in" fo:margin-top="0in" fo:margin-bottom="0in" style:contextual-spacing="false" fo:orphans="2" fo:widows="2" fo:text-indent="0in" style:auto-text-indent="false" fo:padding="0.0193in" fo:border="0.06pt solid #000000"/>
      <style:text-properties fo:font-variant="normal" fo:text-transform="none" style:font-name="Inter" fo:font-size="12pt" fo:letter-spacing="normal" fo:font-style="normal" fo:font-weight="normal" officeooo:rsid="00172afb"/>
    </style:style>
    <style:style style:name="P7" style:family="paragraph" style:parent-style-name="Preformatted_20_Text">
      <style:paragraph-properties fo:margin-left="0in" fo:margin-right="0in" fo:margin-top="0in" fo:margin-bottom="0in" style:contextual-spacing="false" fo:line-height="170%" fo:orphans="2" fo:widows="2" fo:text-indent="0in" style:auto-text-indent="false" fo:padding-left="0.0193in" fo:padding-right="0in" fo:padding-top="0.0193in" fo:padding-bottom="0.0193in" fo:border-left="0.06pt solid #000000" fo:border-right="none" fo:border-top="0.06pt solid #000000" fo:border-bottom="0.06pt solid #000000"/>
      <style:text-properties officeooo:rsid="00172afb"/>
    </style:style>
    <style:style style:name="T1" style:family="text">
      <style:text-properties fo:font-variant="normal" fo:text-transform="none" style:text-line-through-style="none" style:text-line-through-type="none" style:font-name="Inter" fo:font-size="12pt" fo:letter-spacing="normal" fo:font-style="normal" style:text-underline-style="none" fo:font-weight="bold" style:text-blinking="false" loext:padding="0.0193in" loext:border="0.06pt solid #000000"/>
    </style:style>
    <style:style style:name="T2" style:family="text">
      <style:text-properties fo:font-variant="normal" fo:text-transform="none" style:font-name="Inter" fo:font-size="12pt" fo:letter-spacing="normal" fo:font-style="normal" fo:font-weight="normal"/>
    </style:style>
    <style:style style:name="T3" style:family="text">
      <style:text-properties fo:font-variant="normal" fo:text-transform="none" fo:font-family="ui-monospace, SFMono-Regular, Menlo, Monaco, Consolas, 'Liberation Mono', 'Courier New', monospace" fo:font-size="12pt" fo:letter-spacing="normal" fo:font-style="normal" fo:font-weight="normal" loext:padding-left="0.0417in" loext:padding-right="0in" loext:padding-top="0.0417in" loext:padding-bottom="0.0417in" loext:border-left="0.06pt solid #000000" loext:border-right="none" loext:border-top="0.06pt solid #000000" loext:border-bottom="0.06pt solid #000000"/>
    </style:style>
    <style:style style:name="T4" style:family="text">
      <style:text-properties fo:font-variant="normal" fo:text-transform="none" style:font-name="Inter" fo:font-size="12pt" fo:letter-spacing="normal" fo:font-style="normal" style:text-underline-style="solid" style:text-underline-width="auto" style:text-underline-color="font-color" fo:font-weight="bold" loext:padding="0.0193in" loext:border="0.06pt solid #000000"/>
    </style:style>
    <style:style style:name="T5" style:family="text">
      <style:text-properties fo:font-variant="normal" fo:text-transform="none" style:font-name="Inter" fo:font-size="12pt" fo:letter-spacing="normal" fo:font-style="normal" fo:font-weight="normal" loext:padding="0.0193in" loext:border="0.06pt solid #000000"/>
    </style:style>
    <style:style style:name="T6" style:family="text">
      <style:text-properties fo:font-variant="normal" fo:text-transform="none" fo:color="#cccccc" loext:opacity="100%" fo:font-family="Consolas, Monaco, 'Ubuntu Mono', monospace" fo:font-size="12pt" fo:letter-spacing="normal" fo:font-style="normal" fo:font-weight="normal" fo:background-color="transparent" loext:char-shading-value="0" loext:padding="0.0193in" loext:border="0.06pt solid #000000"/>
    </style:style>
    <style:style style:name="T7" style:family="text">
      <style:text-properties fo:font-variant="normal" fo:text-transform="none" fo:color="#999999" loext:opacity="100%" fo:font-family="Consolas, Monaco, 'Ubuntu Mono', monospace" fo:font-size="12pt" fo:letter-spacing="normal" fo:font-style="normal" fo:font-weight="normal" fo:background-color="transparent" loext:char-shading-value="0" loext:padding="0.0193in" loext:border="0.06pt solid #000000"/>
    </style:style>
    <style:style style:name="T8" style:family="text">
      <style:text-properties fo:font-variant="normal" fo:text-transform="none" fo:color="#e2777a" loext:opacity="100%" fo:font-family="Consolas, Monaco, 'Ubuntu Mono', monospace" fo:font-size="12pt" fo:letter-spacing="normal" fo:font-style="normal" fo:font-weight="normal" fo:background-color="transparent" loext:char-shading-value="0" loext:padding="0.0193in" loext:border="0.06pt solid #000000"/>
    </style:style>
    <style:style style:name="T9" style:family="text">
      <style:text-properties fo:font-variant="normal" fo:text-transform="none" fo:color="#7ec699" loext:opacity="100%" fo:font-family="Consolas, Monaco, 'Ubuntu Mono', monospace" fo:font-size="12pt" fo:letter-spacing="normal" fo:font-style="normal" fo:font-weight="normal" fo:background-color="transparent" loext:char-shading-value="0" loext:padding="0.0193in" loext:border="0.06pt solid #000000"/>
    </style:style>
    <style:style style:name="T10" style:family="text">
      <style:text-properties fo:font-variant="normal" fo:text-transform="none" fo:color="#cccccc" loext:opacity="100%" fo:letter-spacing="normal" fo:background-color="transparent" loext:char-shading-value="0" loext:padding-left="0.0193in" loext:padding-right="0in" loext:padding-top="0.0311in" loext:padding-bottom="0.0193in" loext:border-left="0.06pt solid #000000" loext:border-right="none" loext:border-top="0.06pt solid #000000" loext:border-bottom="0.06pt solid #000000"/>
    </style:style>
    <style:style style:name="T11" style:family="text">
      <style:text-properties fo:font-variant="normal" fo:text-transform="none" fo:color="#cccccc" loext:opacity="100%" fo:font-family="Consolas, Monaco, 'Ubuntu Mono', monospace" fo:font-size="12pt" fo:letter-spacing="normal" fo:font-style="normal" fo:font-weight="normal" fo:background-color="transparent" loext:char-shading-value="0" loext:padding-left="0.0193in" loext:padding-right="0in" loext:padding-top="0.0311in" loext:padding-bottom="0.0193in" loext:border-left="0.06pt solid #000000" loext:border-right="none" loext:border-top="0.06pt solid #000000" loext:border-bottom="0.06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ypes of <text:s/>Links</text:p>
      <text:p text:style-name="P1"/>
      <text:p text:style-name="P1">1. Absolute Links</text:p>
      <text:p text:style-name="P1">2. Relative Links</text:p>
      <text:p text:style-name="P1"/>
      <text:p text:style-name="P1"/>
      <text:h text:style-name="P2" text:outline-level="4"><text:a xlink:type="simple" xlink:href="https://www.theodinproject.com/lessons/foundations-links-and-images#absolute-links" text:style-name="Internet_20_link" text:visited-style-name="Visited_20_Internet_20_Link"><text:bookmark text:name="absolute-links"/><text:span text:style-name="T1">Absolute links</text:span></text:a></text:h>
      <text:p text:style-name="P3"><text:span text:style-name="T2">Links to pages on other websites on the internet are called absolute links. A typical absolute link will be made up of the following parts: </text:span><text:span text:style-name="Source_20_Text"><text:span text:style-name="T3">scheme://domain/path</text:span></text:span><text:span text:style-name="T2">. An absolute link will always contain the </text:span><text:a xlink:type="simple" xlink:href="https://developer.mozilla.org/en-US/docs/Learn/Common_questions/Web_mechanics/What_is_a_URL#basics_anatomy_of_a_url" text:style-name="Internet_20_link" text:visited-style-name="Visited_20_Internet_20_Link"><text:span text:style-name="T4">scheme and domain</text:span></text:a><text:span text:style-name="T2"> of the destination.</text:span></text:p>
      <text:p text:style-name="P4">We’ve already seen an absolute link in action. The link we created to The Odin Project’s About page earlier was an absolute link as it contains the scheme and domain.</text:p>
      <text:p text:style-name="P3"><text:span text:style-name="Source_20_Text"><text:span text:style-name="T3">https://www.theodinproject.com/about</text:span></text:span></text:p>
      <text:h text:style-name="P5" text:outline-level="4"><text:a xlink:type="simple" xlink:href="https://www.theodinproject.com/lessons/foundations-links-and-images#relative-links" text:style-name="Internet_20_link" text:visited-style-name="Visited_20_Internet_20_Link"><text:bookmark text:name="relative-links"/><text:span text:style-name="T1">Relative links</text:span></text:a></text:h>
      <text:p text:style-name="P6">Links to other pages within our own website are called relative links. Relative links do not include the domain name, since it is another page on the same site, it assumes the domain name will be the same as the page we created the link on.</text:p>
      <text:p text:style-name="P3"><text:span text:style-name="T2">Relative links only include the file path to the other page, </text:span><text:span text:style-name="Emphasis"><text:span text:style-name="T5">relative</text:span></text:span><text:span text:style-name="T2"> to the page you are creating the link on. This is quite abstract, let’s see this in action using an example.</text:span></text:p>
      <text:p text:style-name="P3"><text:span text:style-name="T2">Within the </text:span><text:span text:style-name="Source_20_Text"><text:span text:style-name="T3">odin-links-and-images</text:span></text:span><text:span text:style-name="T2"> directory, create another HTML file named </text:span><text:span text:style-name="Source_20_Text"><text:span text:style-name="T3">about.html</text:span></text:span><text:span text:style-name="T2"> and paste the following code into it:</text:span></text:p>
      <text:p text:style-name="P7"><text:span text:style-name="Source_20_Text"><text:span text:style-name="T6">&lt;!</text:span></text:span><text:span text:style-name="Source_20_Text"><text:span text:style-name="T7">DOCTYPE html</text:span></text:span><text:span text:style-name="Source_20_Text"><text:span text:style-name="T6">&gt;</text:span></text:span></text:p>
      <text:p text:style-name="P7"><text:span text:style-name="Source_20_Text"><text:span text:style-name="T6">&lt;</text:span></text:span><text:span text:style-name="Source_20_Text"><text:span text:style-name="T8">html lang</text:span></text:span><text:span text:style-name="Source_20_Text"><text:span text:style-name="T6">="</text:span></text:span><text:span text:style-name="Source_20_Text"><text:span text:style-name="T9">en</text:span></text:span><text:span text:style-name="Source_20_Text"><text:span text:style-name="T6">"&gt;</text:span></text:span></text:p>
      <text:p text:style-name="P7"><text:span text:style-name="Source_20_Text"><text:span text:style-name="T10"><text:s text:c="2"/></text:span></text:span><text:span text:style-name="Source_20_Text"><text:span text:style-name="T6">&lt;</text:span></text:span><text:span text:style-name="Source_20_Text"><text:span text:style-name="T8">head</text:span></text:span><text:span text:style-name="Source_20_Text"><text:span text:style-name="T6">&gt;</text:span></text:span></text:p>
      <text:p text:style-name="P7"><text:span text:style-name="Source_20_Text"><text:span text:style-name="T10"><text:s text:c="4"/></text:span></text:span><text:span text:style-name="Source_20_Text"><text:span text:style-name="T6">&lt;</text:span></text:span><text:span text:style-name="Source_20_Text"><text:span text:style-name="T8">meta charset</text:span></text:span><text:span text:style-name="Source_20_Text"><text:span text:style-name="T6">="</text:span></text:span><text:span text:style-name="Source_20_Text"><text:span text:style-name="T9">UTF-8</text:span></text:span><text:span text:style-name="Source_20_Text"><text:span text:style-name="T6">"&gt;</text:span></text:span></text:p>
      <text:p text:style-name="P7"><text:span text:style-name="Source_20_Text"><text:span text:style-name="T10"><text:s text:c="4"/></text:span></text:span><text:span text:style-name="Source_20_Text"><text:span text:style-name="T6">&lt;</text:span></text:span><text:span text:style-name="Source_20_Text"><text:span text:style-name="T8">title</text:span></text:span><text:span text:style-name="Source_20_Text"><text:span text:style-name="T6">&gt;</text:span></text:span><text:span text:style-name="Source_20_Text"><text:span text:style-name="T11">Odin Links and Images</text:span></text:span><text:span text:style-name="Source_20_Text"><text:span text:style-name="T6">&lt;/</text:span></text:span><text:span text:style-name="Source_20_Text"><text:span text:style-name="T8">title</text:span></text:span><text:span text:style-name="Source_20_Text"><text:span text:style-name="T6">&gt;</text:span></text:span></text:p>
      <text:p text:style-name="P7"><text:span text:style-name="Source_20_Text"><text:span text:style-name="T10"><text:s text:c="2"/></text:span></text:span><text:span text:style-name="Source_20_Text"><text:span text:style-name="T6">&lt;/</text:span></text:span><text:span text:style-name="Source_20_Text"><text:span text:style-name="T8">head</text:span></text:span><text:span text:style-name="Source_20_Text"><text:span text:style-name="T6">&gt;</text:span></text:span></text:p>
      <text:p text:style-name="P7"/>
      <text:p text:style-name="P7"><text:span text:style-name="Source_20_Text"><text:span text:style-name="T10"><text:s text:c="2"/></text:span></text:span><text:span text:style-name="Source_20_Text"><text:span text:style-name="T6">&lt;</text:span></text:span><text:span text:style-name="Source_20_Text"><text:span text:style-name="T8">body</text:span></text:span><text:span text:style-name="Source_20_Text"><text:span text:style-name="T6">&gt;</text:span></text:span></text:p>
      <text:p text:style-name="P7"><text:soft-page-break/><text:span text:style-name="Source_20_Text"><text:span text:style-name="T10"><text:s text:c="4"/></text:span></text:span><text:span text:style-name="Source_20_Text"><text:span text:style-name="T6">&lt;</text:span></text:span><text:span text:style-name="Source_20_Text"><text:span text:style-name="T8">h1</text:span></text:span><text:span text:style-name="Source_20_Text"><text:span text:style-name="T6">&gt;</text:span></text:span><text:span text:style-name="Source_20_Text"><text:span text:style-name="T11">About Page</text:span></text:span><text:span text:style-name="Source_20_Text"><text:span text:style-name="T6">&lt;/</text:span></text:span><text:span text:style-name="Source_20_Text"><text:span text:style-name="T8">h1</text:span></text:span><text:span text:style-name="Source_20_Text"><text:span text:style-name="T6">&gt;</text:span></text:span></text:p>
      <text:p text:style-name="P7"><text:span text:style-name="Source_20_Text"><text:span text:style-name="T10"><text:s text:c="2"/></text:span></text:span><text:span text:style-name="Source_20_Text"><text:span text:style-name="T6">&lt;/</text:span></text:span><text:span text:style-name="Source_20_Text"><text:span text:style-name="T8">body</text:span></text:span><text:span text:style-name="Source_20_Text"><text:span text:style-name="T6">&gt;</text:span></text:span></text:p>
      <text:p text:style-name="P7"><text:span text:style-name="Source_20_Text"><text:span text:style-name="T6">&lt;/</text:span></text:span><text:span text:style-name="Source_20_Text"><text:span text:style-name="T8">html</text:span></text:span><text:span text:style-name="Source_20_Text"><text:span text:style-name="T6">&gt;</text:span></text:span></text:p>
      <text:p text:style-name="P4">Back in the index page, add the following anchor element to create a link to the about page:</text:p>
      <text:p text:style-name="P7"><text:span text:style-name="Source_20_Text"><text:span text:style-name="T6">&lt;</text:span></text:span><text:span text:style-name="Source_20_Text"><text:span text:style-name="T8">body</text:span></text:span><text:span text:style-name="Source_20_Text"><text:span text:style-name="T6">&gt;</text:span></text:span></text:p>
      <text:p text:style-name="P7"><text:span text:style-name="Source_20_Text"><text:span text:style-name="T10"><text:s text:c="2"/></text:span></text:span><text:span text:style-name="Source_20_Text"><text:span text:style-name="T6">&lt;</text:span></text:span><text:span text:style-name="Source_20_Text"><text:span text:style-name="T8">h1</text:span></text:span><text:span text:style-name="Source_20_Text"><text:span text:style-name="T6">&gt;</text:span></text:span><text:span text:style-name="Source_20_Text"><text:span text:style-name="T11">Homepage</text:span></text:span><text:span text:style-name="Source_20_Text"><text:span text:style-name="T6">&lt;/</text:span></text:span><text:span text:style-name="Source_20_Text"><text:span text:style-name="T8">h1</text:span></text:span><text:span text:style-name="Source_20_Text"><text:span text:style-name="T6">&gt;</text:span></text:span></text:p>
      <text:p text:style-name="P7"><text:span text:style-name="Source_20_Text"><text:span text:style-name="T10"><text:s text:c="2"/></text:span></text:span><text:span text:style-name="Source_20_Text"><text:span text:style-name="T6">&lt;</text:span></text:span><text:span text:style-name="Source_20_Text"><text:span text:style-name="T8">a href</text:span></text:span><text:span text:style-name="Source_20_Text"><text:span text:style-name="T6">="</text:span></text:span><text:span text:style-name="Source_20_Text"><text:span text:style-name="T9">https://www.theodinproject.com/about</text:span></text:span><text:span text:style-name="Source_20_Text"><text:span text:style-name="T6">"&gt;</text:span></text:span><text:span text:style-name="Source_20_Text"><text:span text:style-name="T11">About The Odin Project</text:span></text:span><text:span text:style-name="Source_20_Text"><text:span text:style-name="T6">&lt;/</text:span></text:span><text:span text:style-name="Source_20_Text"><text:span text:style-name="T8">a</text:span></text:span><text:span text:style-name="Source_20_Text"><text:span text:style-name="T6">&gt;</text:span></text:span></text:p>
      <text:p text:style-name="P7"/>
      <text:p text:style-name="P7"><text:span text:style-name="Source_20_Text"><text:span text:style-name="T10"><text:s text:c="2"/></text:span></text:span><text:span text:style-name="Source_20_Text"><text:span text:style-name="T6">&lt;</text:span></text:span><text:span text:style-name="Source_20_Text"><text:span text:style-name="T8">a href</text:span></text:span><text:span text:style-name="Source_20_Text"><text:span text:style-name="T6">="</text:span></text:span><text:span text:style-name="Source_20_Text"><text:span text:style-name="T9">about.html</text:span></text:span><text:span text:style-name="Source_20_Text"><text:span text:style-name="T6">"&gt;</text:span></text:span><text:span text:style-name="Source_20_Text"><text:span text:style-name="T11">About</text:span></text:span><text:span text:style-name="Source_20_Text"><text:span text:style-name="T6">&lt;/</text:span></text:span><text:span text:style-name="Source_20_Text"><text:span text:style-name="T8">a</text:span></text:span><text:span text:style-name="Source_20_Text"><text:span text:style-name="T6">&gt;</text:span></text:span></text:p>
      <text:p text:style-name="P7"><text:span text:style-name="Source_20_Text"><text:span text:style-name="T6">&lt;/</text:span></text:span><text:span text:style-name="Source_20_Text"><text:span text:style-name="T8">body</text:span></text:span><text:span text:style-name="Source_20_Text"><text:span text:style-name="T6">&gt;</text:span></text:span></text:p>
      <text:p text:style-name="P4">Open the index file in a browser and click on the about link to make sure it is all wired together correctly. Clicking the link should go to the about page we just created.</text:p>
      <text:p text:style-name="P3"><text:span text:style-name="T2">This works because the index and about page are in the same directory. That means we can use its name (</text:span><text:span text:style-name="Source_20_Text"><text:span text:style-name="T3">about.html</text:span></text:span><text:span text:style-name="T2">) as the link’s </text:span><text:span text:style-name="Source_20_Text"><text:span text:style-name="T3">href</text:span></text:span><text:span text:style-name="T2"> value.</text:span></text:p>
      <text:p text:style-name="P3"><text:span text:style-name="T2">But we will usually want to organize our website directories a little better. Normally we would only have the </text:span><text:span text:style-name="Source_20_Text"><text:span text:style-name="T3">index.html</text:span></text:span><text:span text:style-name="T2"> at the root directory and all other HTML files in their own directory.</text:span></text:p>
      <text:p text:style-name="P3"><text:span text:style-name="T2">Create a directory named </text:span><text:span text:style-name="Source_20_Text"><text:span text:style-name="T3">pages</text:span></text:span><text:span text:style-name="T2"> within the </text:span><text:span text:style-name="Source_20_Text"><text:span text:style-name="T3">odin-links-and-images</text:span></text:span><text:span text:style-name="T2"> directory and move the </text:span><text:span text:style-name="Source_20_Text"><text:span text:style-name="T3">about.html</text:span></text:span><text:span text:style-name="T2"> file into this new directory.</text:span></text:p>
      <text:p text:style-name="P4">Refresh the index page in the browser and then click on the about link. It will now be broken. This is because the location of the about page file has changed.</text:p>
      <text:p text:style-name="P3"><text:soft-page-break/><text:span text:style-name="T2">To fix this, we just need to update the about link </text:span><text:span text:style-name="Source_20_Text"><text:span text:style-name="T3">href</text:span></text:span><text:span text:style-name="T2"> value to include the </text:span><text:span text:style-name="Source_20_Text"><text:span text:style-name="T3">pages/</text:span></text:span><text:span text:style-name="T2"> directory since that is the new location of the about file </text:span><text:span text:style-name="Emphasis"><text:span text:style-name="T5">relative</text:span></text:span><text:span text:style-name="T2"> to the index file.</text:span></text:p>
      <text:p text:style-name="P7"><text:span text:style-name="Source_20_Text"><text:span text:style-name="T6">&lt;</text:span></text:span><text:span text:style-name="Source_20_Text"><text:span text:style-name="T8">body</text:span></text:span><text:span text:style-name="Source_20_Text"><text:span text:style-name="T6">&gt;</text:span></text:span></text:p>
      <text:p text:style-name="P7"><text:span text:style-name="Source_20_Text"><text:span text:style-name="T10"><text:s text:c="2"/></text:span></text:span><text:span text:style-name="Source_20_Text"><text:span text:style-name="T6">&lt;</text:span></text:span><text:span text:style-name="Source_20_Text"><text:span text:style-name="T8">h1</text:span></text:span><text:span text:style-name="Source_20_Text"><text:span text:style-name="T6">&gt;</text:span></text:span><text:span text:style-name="Source_20_Text"><text:span text:style-name="T11">Homepage</text:span></text:span><text:span text:style-name="Source_20_Text"><text:span text:style-name="T6">&lt;/</text:span></text:span><text:span text:style-name="Source_20_Text"><text:span text:style-name="T8">h1</text:span></text:span><text:span text:style-name="Source_20_Text"><text:span text:style-name="T6">&gt;</text:span></text:span></text:p>
      <text:p text:style-name="P7"><text:span text:style-name="Source_20_Text"><text:span text:style-name="T10"><text:s text:c="2"/></text:span></text:span><text:span text:style-name="Source_20_Text"><text:span text:style-name="T6">&lt;</text:span></text:span><text:span text:style-name="Source_20_Text"><text:span text:style-name="T8">a href</text:span></text:span><text:span text:style-name="Source_20_Text"><text:span text:style-name="T6">="</text:span></text:span><text:span text:style-name="Source_20_Text"><text:span text:style-name="T9">pages/about.html</text:span></text:span><text:span text:style-name="Source_20_Text"><text:span text:style-name="T6">"&gt;</text:span></text:span><text:span text:style-name="Source_20_Text"><text:span text:style-name="T11">About</text:span></text:span><text:span text:style-name="Source_20_Text"><text:span text:style-name="T6">&lt;/</text:span></text:span><text:span text:style-name="Source_20_Text"><text:span text:style-name="T8">a</text:span></text:span><text:span text:style-name="Source_20_Text"><text:span text:style-name="T6">&gt;</text:span></text:span></text:p>
      <text:p text:style-name="P7"><text:span text:style-name="Source_20_Text"><text:span text:style-name="T6">&lt;/</text:span></text:span><text:span text:style-name="Source_20_Text"><text:span text:style-name="T8">body</text:span></text:span><text:span text:style-name="Source_20_Text"><text:span text:style-name="T6">&gt;</text:span></text:span></text:p>
      <text:p text:style-name="P4">Refresh the index page in the browser and try clicking the about link again, it should now be back in working order.</text:p>
      <text:p text:style-name="P3"><text:span text:style-name="T2">In many cases, this will work just fine; however, you can still run into unexpected issues with this approach. Prepending </text:span><text:span text:style-name="Source_20_Text"><text:span text:style-name="T3">./</text:span></text:span><text:span text:style-name="T2"> before the link will in most cases prevent such issues. By adding </text:span><text:span text:style-name="Source_20_Text"><text:span text:style-name="T3">./</text:span></text:span><text:span text:style-name="T2"> you are specifying to your code that it should start looking for the file/directory </text:span><text:span text:style-name="Emphasis"><text:span text:style-name="T5">relative</text:span></text:span><text:span text:style-name="T2"> to the </text:span><text:span text:style-name="Source_20_Text"><text:span text:style-name="T3">current</text:span></text:span><text:span text:style-name="T2"> directory.</text:span></text:p>
      <text:p text:style-name="P7"><text:span text:style-name="Source_20_Text"><text:span text:style-name="T6">&lt;</text:span></text:span><text:span text:style-name="Source_20_Text"><text:span text:style-name="T8">body</text:span></text:span><text:span text:style-name="Source_20_Text"><text:span text:style-name="T6">&gt;</text:span></text:span></text:p>
      <text:p text:style-name="P7"><text:span text:style-name="Source_20_Text"><text:span text:style-name="T10"><text:s text:c="2"/></text:span></text:span><text:span text:style-name="Source_20_Text"><text:span text:style-name="T6">&lt;</text:span></text:span><text:span text:style-name="Source_20_Text"><text:span text:style-name="T8">h1</text:span></text:span><text:span text:style-name="Source_20_Text"><text:span text:style-name="T6">&gt;</text:span></text:span><text:span text:style-name="Source_20_Text"><text:span text:style-name="T11">Homepage</text:span></text:span><text:span text:style-name="Source_20_Text"><text:span text:style-name="T6">&lt;/</text:span></text:span><text:span text:style-name="Source_20_Text"><text:span text:style-name="T8">h1</text:span></text:span><text:span text:style-name="Source_20_Text"><text:span text:style-name="T6">&gt;</text:span></text:span></text:p>
      <text:p text:style-name="P7"><text:span text:style-name="Source_20_Text"><text:span text:style-name="T10"><text:s text:c="2"/></text:span></text:span><text:span text:style-name="Source_20_Text"><text:span text:style-name="T6">&lt;</text:span></text:span><text:span text:style-name="Source_20_Text"><text:span text:style-name="T8">a href</text:span></text:span><text:span text:style-name="Source_20_Text"><text:span text:style-name="T6">="</text:span></text:span><text:span text:style-name="Source_20_Text"><text:span text:style-name="T9">./pages/about.html</text:span></text:span><text:span text:style-name="Source_20_Text"><text:span text:style-name="T6">"&gt;</text:span></text:span><text:span text:style-name="Source_20_Text"><text:span text:style-name="T11">About</text:span></text:span><text:span text:style-name="Source_20_Text"><text:span text:style-name="T6">&lt;/</text:span></text:span><text:span text:style-name="Source_20_Text"><text:span text:style-name="T8">a</text:span></text:span><text:span text:style-name="Source_20_Text"><text:span text:style-name="T6">&gt;</text:span></text:span></text:p>
      <text:p text:style-name="P7"><text:span text:style-name="Source_20_Text"><text:span text:style-name="T6">&lt;/</text:span></text:span><text:span text:style-name="Source_20_Text"><text:span text:style-name="T8">body</text:span></text:span><text:span text:style-name="Source_20_Text"><text:span text:style-name="T6">&gt;</text:span></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nter" svg:font-family="Inter,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1T10:34:02.440730092</meta:creation-date>
    <dc:date>2026-06-11T10:35:55.289521304</dc:date>
    <meta:editing-duration>PT1M54S</meta:editing-duration>
    <meta:editing-cycles>1</meta:editing-cycles>
    <meta:document-statistic meta:table-count="0" meta:image-count="0" meta:object-count="0" meta:page-count="3" meta:paragraph-count="43" meta:word-count="484" meta:character-count="2981" meta:non-whitespace-character-count="2505"/>
    <meta:generator>LibreOffice/26.2.4.2$Linux_X86_64 LibreOffice_project/c44d3140fc62714965bf5d98735e0d79ba4b1ebd</meta:generator>
  </office:meta>
</office:document-meta>
</file>