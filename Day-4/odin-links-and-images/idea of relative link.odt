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Inter" svg:font-family="Inter,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5pt" officeooo:rsid="00158057" officeooo:paragraph-rsid="00158057" style:font-size-asian="21.8500003814697pt" style:font-size-complex="25pt"/>
    </style:style>
    <style:style style:name="P2" style:family="paragraph" style:parent-style-name="Standard">
      <style:text-properties fo:font-variant="normal" fo:text-transform="none" style:font-name="Inter" fo:font-size="15pt" fo:letter-spacing="normal" fo:font-style="normal" fo:font-weight="normal" officeooo:rsid="00158057" officeooo:paragraph-rsid="00158057" style:font-size-asian="15pt" style:font-size-complex="15pt"/>
    </style:style>
    <style:style style:name="P3" style:family="paragraph" style:parent-style-name="Standard">
      <style:text-properties fo:font-variant="normal" fo:text-transform="none" style:font-name="Inter" fo:font-size="12pt" fo:letter-spacing="normal" fo:font-style="normal" fo:font-weight="normal" officeooo:rsid="00158057" officeooo:paragraph-rsid="00158057" style:font-size-asian="21.8500003814697pt" style:font-size-complex="2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idea of relative links is to link the other pages of our own site</text:p>
      <text:p text:style-name="P1"/>
      <text:p text:style-name="P2">Links to other pages within our own website are called relative links. Relative links do not include the domain name, since it is another page on the same site, it assumes the domain name will be the same as the page we created the link on.</text:p>
      <text:p text:style-name="P2"/>
      <text:p text:style-name="P2">My experience</text:p>
      <text:p text:style-name="P2"/>
      <text:p text:style-name="P2">1. Created a index.html file and <text:s/>added my git hub page links</text:p>
      <text:p text:style-name="P2">as _self and _blank</text:p>
      <text:p text:style-name="P2"/>
      <text:p text:style-name="P2">2. Then I created a new file called “About Page” and linked</text:p>
      <text:p text:style-name="P2">it as about page but I linked it but entering its raw file name using</text:p>
      <text:p text:style-name="P2">anchor tag.</text:p>
      <text:p text:style-name="P2"/>
      <text:p text:style-name="P2">3. unlike the Absolute links we provide the file name inside the href instead of link.</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Inter" svg:font-family="Inter,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1T10:40:20.935321517</meta:creation-date>
    <dc:date>2026-06-11T10:46:49.940394873</dc:date>
    <meta:editing-duration>PT6M30S</meta:editing-duration>
    <meta:editing-cycles>1</meta:editing-cycles>
    <meta:generator>LibreOffice/26.2.4.2$Linux_X86_64 LibreOffice_project/c44d3140fc62714965bf5d98735e0d79ba4b1ebd</meta:generator>
    <meta:document-statistic meta:table-count="0" meta:image-count="0" meta:object-count="0" meta:page-count="1" meta:paragraph-count="9" meta:word-count="124" meta:character-count="627" meta:non-whitespace-character-count="511"/>
  </office:meta>
</office:document-meta>
</file>