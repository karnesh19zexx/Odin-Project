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fo:padding="0.0193in" fo:border="0.06pt solid #000000"/>
    </style:style>
    <style:style style:name="P2" style:family="paragraph" style:parent-style-name="Heading_20_4">
      <style:paragraph-properties fo:margin-left="0in" fo:margin-right="0in" fo:margin-top="0in" fo:margin-bottom="0in" style:contextual-spacing="false" fo:line-height="150%" fo:text-indent="0in" style:auto-text-indent="false" fo:padding="0.0193in" fo:border="0.06pt solid #000000"/>
    </style:style>
    <style:style style:name="P3" style:family="paragraph" style:parent-style-name="Preformatted_20_Text">
      <style:paragraph-properties fo:margin-left="0in" fo:margin-right="0in" fo:margin-top="0in" fo:margin-bottom="0in" style:contextual-spacing="false" fo:line-height="170%" fo:text-indent="0in" style:auto-text-indent="false" fo:padding-left="0.0193in" fo:padding-right="0in" fo:padding-top="0.0193in" fo:padding-bottom="0.0193in" fo:border-left="0.06pt solid #000000" fo:border-right="none" fo:border-top="0.06pt solid #000000" fo:border-bottom="0.06pt solid #000000"/>
    </style:style>
    <style:style style:name="P4" style:family="paragraph" style:parent-style-name="Preformatted_20_Text">
      <style:paragraph-properties fo:margin-left="0in" fo:margin-right="0in" fo:margin-top="0in" fo:margin-bottom="0in" style:contextual-spacing="false" fo:line-height="170%" fo:padding-left="0.0193in" fo:padding-right="0in" fo:padding-top="0.0193in" fo:padding-bottom="0.0193in" fo:border-left="0.06pt solid #000000" fo:border-right="none" fo:border-top="0.06pt solid #000000" fo:border-bottom="0.06pt solid #000000"/>
    </style:style>
    <style:style style:name="P5" style:family="paragraph" style:parent-style-name="Text_20_body">
      <style:paragraph-properties fo:margin-left="0in" fo:margin-right="0in" fo:text-indent="0in" style:auto-text-indent="false" fo:padding="0.0193in" fo:border="0.06pt solid #000000"/>
    </style:style>
    <style:style style:name="T1" style:family="text">
      <style:text-properties style:text-line-through-style="none" style:text-line-through-type="none" style:text-underline-style="none" fo:font-weight="bold" style:text-blinking="false" loext:padding="0.0193in" loext:border="0.06pt solid #000000"/>
    </style:style>
    <style:style style:name="T2" style:family="text">
      <style:text-properties fo:font-family="ui-monospace, SFMono-Regular, Menlo, Monaco, Consolas, 'Liberation Mono', 'Courier New', monospace" fo:font-weight="normal" loext:padding-left="0.0417in" loext:padding-right="0in" loext:padding-top="0.0417in" loext:padding-bottom="0.0417in" loext:border-left="0.06pt solid #000000" loext:border-right="none" loext:border-top="0.06pt solid #000000" loext:border-bottom="0.06pt solid #000000"/>
    </style:style>
    <style:style style:name="T3" style:family="text">
      <style:text-properties fo:color="#cc99cd" loext:opacity="100%" fo:font-family="Consolas, Monaco, 'Ubuntu Mono', monospace" fo:font-weight="normal" fo:background-color="transparent" loext:char-shading-value="0" loext:padding="0.0193in" loext:border="0.06pt solid #000000"/>
    </style:style>
    <style:style style:name="T4" style:family="text">
      <style:text-properties fo:color="#cccccc" loext:opacity="100%" fo:font-family="Consolas, Monaco, 'Ubuntu Mono', monospace" fo:font-weight="normal"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style:style style:name="T5" style:family="text">
      <style:text-properties fo:color="#cccccc" loext:opacity="100%" fo:font-family="Consolas, Monaco, 'Ubuntu Mono', monospace" fo:font-weight="normal" fo:background-color="transparent" loext:char-shading-value="0" loext:padding="0.0193in" loext:border="0.06pt solid #000000"/>
    </style:style>
    <style:style style:name="T6" style:family="text">
      <style:text-properties fo:color="#cccccc" loext:opacity="100%"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style:style style:name="T7" style:family="text">
      <style:text-properties fo:color="#f8c555" loext:opacity="100%" fo:font-family="Consolas, Monaco, 'Ubuntu Mono', monospace" fo:font-weight="normal" fo:background-color="transparent" loext:char-shading-value="0" loext:padding="0.0193in" loext:border="0.06pt solid #000000"/>
    </style:style>
    <style:style style:name="T8" style:family="text">
      <style:text-properties fo:color="#999999" loext:opacity="100%" fo:font-family="Consolas, Monaco, 'Ubuntu Mono', monospace" fo:font-weight="normal" fo:background-color="transparent" loext:char-shading-value="0" loext:padding="0.0193in" loext:border="0.06pt solid #000000"/>
    </style:style>
    <style:style style:name="T9" style:family="text">
      <style:text-properties fo:color="#e2777a" loext:opacity="100%" fo:font-family="Consolas, Monaco, 'Ubuntu Mono', monospace" fo:font-weight="normal" fo:background-color="transparent" loext:char-shading-value="0" loext:padding="0.0193in" loext:border="0.06pt solid #000000"/>
    </style:style>
    <style:style style:name="T10" style:family="text">
      <style:text-properties fo:color="#7ec699" loext:opacity="100%" fo:font-family="Consolas, Monaco, 'Ubuntu Mono', monospace" fo:font-weight="normal" fo:background-color="transparent" loext:char-shading-value="0" loext:padding="0.0193in" loext:border="0.06pt solid #000000"/>
    </style:style>
    <style:style style:name="T11" style:family="text">
      <style:text-properties loext:padding="0in" loext:border="none"/>
    </style:style>
    <style:style style:name="T12" style:family="text">
      <style:text-properties fo:font-weight="bold" loext:padding="0.0193in" loext:border="0.06pt solid #000000"/>
    </style:style>
    <style:style style:name="T13" style:family="text">
      <style:text-properties loext:padding="0.0193in" loext:border="0.06pt solid #000000"/>
    </style:style>
    <style:style style:name="T14" style:family="text">
      <style:text-properties style:text-underline-style="solid" style:text-underline-width="auto" style:text-underline-color="font-color" fo:font-weight="bold" loext:padding="0.0193in" loext: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s://www.theodinproject.com/lessons/foundations-intro-to-css#selectors" text:style-name="Internet_20_link" text:visited-style-name="Visited_20_Internet_20_Link"><text:bookmark text:name="selectors"/><text:span text:style-name="T1">Selectors</text:span></text:a></text:h>
      <text:p text:style-name="P1">Selectors refer to the HTML elements to which CSS rules apply; they’re what is actually being “selected” for each rule. The following subsections don’t cover every selector available, but they’re by far the most common and the ones you should get comfortable using first.</text:p>
      <text:h text:style-name="P2" text:outline-level="4"><text:a xlink:type="simple" xlink:href="https://www.theodinproject.com/lessons/foundations-intro-to-css#universal-selector" text:style-name="Internet_20_link" text:visited-style-name="Visited_20_Internet_20_Link"><text:bookmark text:name="universal-selector"/><text:span text:style-name="T1">Universal selector</text:span></text:a></text:h>
      <text:p text:style-name="P1">The universal selector will select elements of every type (as in the whole document), hence the name “universal”, and the syntax for it is a simple asterisk. In the example below, every element would have the <text:span text:style-name="Source_20_Text"><text:span text:style-name="T2">color: purple;</text:span></text:span> style applied to it.</text:p>
      <text:p text:style-name="P3"><text:span text:style-name="Source_20_Text"><text:span text:style-name="T3">*</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purple</text:span></text:span><text:span text:style-name="Source_20_Text"><text:span text:style-name="T5">;</text:span></text:span></text:p>
      <text:p text:style-name="P3"><text:span text:style-name="Source_20_Text"><text:span text:style-name="T5">}</text:span></text:span></text:p>
      <text:h text:style-name="P2" text:outline-level="4"><text:a xlink:type="simple" xlink:href="https://www.theodinproject.com/lessons/foundations-intro-to-css#type-selectors" text:style-name="Internet_20_link" text:visited-style-name="Visited_20_Internet_20_Link"><text:bookmark text:name="type-selectors"/><text:span text:style-name="T1">Type selectors</text:span></text:a></text:h>
      <text:p text:style-name="P1">A type selector (or element selector) will select all elements of the given element type, and the syntax is just the name of the element:</text:p>
      <text:p text:style-name="P3"><text:span text:style-name="Source_20_Text"><text:span text:style-name="T8">&lt;!-- index.html --&gt;</text:span></text:span></text:p>
      <text:p text:style-name="P4"/>
      <text:p text:style-name="P3"><text:span text:style-name="Source_20_Text"><text:span text:style-name="T5">&lt;</text:span></text:span><text:span text:style-name="Source_20_Text"><text:span text:style-name="T9">div</text:span></text:span><text:span text:style-name="Source_20_Text"><text:span text:style-name="T5">&gt;</text:span></text:span><text:span text:style-name="Source_20_Text"><text:span text:style-name="T4">Hello, World!</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5">&lt;</text:span></text:span><text:span text:style-name="Source_20_Text"><text:span text:style-name="T9">div</text:span></text:span><text:span text:style-name="Source_20_Text"><text:span text:style-name="T5">&gt;</text:span></text:span><text:span text:style-name="Source_20_Text"><text:span text:style-name="T4">Hello again!</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5">&lt;</text:span></text:span><text:span text:style-name="Source_20_Text"><text:span text:style-name="T9">p</text:span></text:span><text:span text:style-name="Source_20_Text"><text:span text:style-name="T5">&gt;</text:span></text:span><text:span text:style-name="Source_20_Text"><text:span text:style-name="T4">Hi...</text:span></text:span><text:span text:style-name="Source_20_Text"><text:span text:style-name="T5">&lt;/</text:span></text:span><text:span text:style-name="Source_20_Text"><text:span text:style-name="T9">p</text:span></text:span><text:span text:style-name="Source_20_Text"><text:span text:style-name="T5">&gt;</text:span></text:span></text:p>
      <text:p text:style-name="P3"><text:span text:style-name="Source_20_Text"><text:span text:style-name="T5">&lt;</text:span></text:span><text:span text:style-name="Source_20_Text"><text:span text:style-name="T9">div</text:span></text:span><text:span text:style-name="Source_20_Text"><text:span text:style-name="T5">&gt;</text:span></text:span><text:span text:style-name="Source_20_Text"><text:span text:style-name="T4">Okay, bye.</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8">/* styles.css */</text:span></text:span></text:p>
      <text:p text:style-name="P4"/>
      <text:p text:style-name="P3"><text:span text:style-name="Source_20_Text"><text:span text:style-name="T3">div</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white</text:span></text:span><text:span text:style-name="Source_20_Text"><text:span text:style-name="T5">;</text:span></text:span></text:p>
      <text:p text:style-name="P3"><text:span text:style-name="Source_20_Text"><text:span text:style-name="T5">}</text:span></text:span></text:p>
      <text:p text:style-name="P1">Here, all three <text:span text:style-name="Source_20_Text"><text:span text:style-name="T2">&lt;div&gt;</text:span></text:span> elements would be selected, while the <text:span text:style-name="Source_20_Text"><text:span text:style-name="T2">&lt;p&gt;</text:span></text:span> element wouldn’t be.</text:p>
      <text:h text:style-name="P2" text:outline-level="4"><text:a xlink:type="simple" xlink:href="https://www.theodinproject.com/lessons/foundations-intro-to-css#class-selectors" text:style-name="Internet_20_link" text:visited-style-name="Visited_20_Internet_20_Link"><text:bookmark text:name="class-selectors"/><text:soft-page-break/><text:span text:style-name="T1">Class selectors</text:span></text:a></text:h>
      <text:p text:style-name="P1">Class selectors will select all elements with the given class, which is just an attribute you place on an HTML element. Here’s how you add a class to an HTML tag and select it in CSS:</text:p>
      <text:p text:style-name="P3"><text:span text:style-name="Source_20_Text"><text:span text:style-name="T8">&lt;!-- index.html --&gt;</text:span></text:span></text:p>
      <text:p text:style-name="P4"/>
      <text:p text:style-name="P3"><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alert-text</text:span></text:span><text:span text:style-name="Source_20_Text"><text:span text:style-name="T5">"&gt;</text:span></text:span><text:span text:style-name="Source_20_Text"><text:span text:style-name="T4">Please agree to our terms of service.</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8">/* styles.css */</text:span></text:span></text:p>
      <text:p text:style-name="P4"/>
      <text:p text:style-name="P3"><text:span text:style-name="Source_20_Text"><text:span text:style-name="T3">.alert-text</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red</text:span></text:span><text:span text:style-name="Source_20_Text"><text:span text:style-name="T5">;</text:span></text:span></text:p>
      <text:p text:style-name="P3"><text:span text:style-name="Source_20_Text"><text:span text:style-name="T5">}</text:span></text:span></text:p>
      <text:p text:style-name="P5">Note the syntax for class selectors: a period immediately followed by the case-sensitive value of the class attribute. Classes aren’t required to be specific to a particular element, so you can use the same class on as many elements as you want.</text:p>
      <text:h text:style-name="P2" text:outline-level="4"><text:a xlink:type="simple" xlink:href="https://www.theodinproject.com/lessons/foundations-intro-to-css#leading-digits-and-classes" text:style-name="Internet_20_link" text:visited-style-name="Visited_20_Internet_20_Link"><text:bookmark text:name="leading-digits-and-classes"/><text:span text:style-name="T1">Leading digits and classes</text:span></text:a></text:h>
      <text:p text:style-name="P1"><text:span text:style-name="T11">Class selectors won’t work if the class name begins with a number. For example, if you give an element the class name </text:span><text:span text:style-name="Source_20_Text"><text:span text:style-name="T2">4lert-text</text:span></text:span><text:span text:style-name="T11">, using </text:span><text:span text:style-name="Source_20_Text"><text:span text:style-name="T2">.4lert-text</text:span></text:span><text:span text:style-name="T11"> as a selector won’t match it.</text:span></text:p>
      <text:p text:style-name="P1">Another thing you can do with the class attribute is to add multiple classes to a single element as a space-separated list, such as <text:span text:style-name="Source_20_Text"><text:span text:style-name="T2">class="alert-text severe-alert"</text:span></text:span>. Since whitespace is used to separate class names like this, you should never use spaces for multi-worded names and should use a hyphen instead.</text:p>
      <text:h text:style-name="P2" text:outline-level="4"><text:a xlink:type="simple" xlink:href="https://www.theodinproject.com/lessons/foundations-intro-to-css#id-selectors" text:style-name="Internet_20_link" text:visited-style-name="Visited_20_Internet_20_Link"><text:bookmark text:name="id-selectors"/><text:span text:style-name="T1">ID selectors</text:span></text:a></text:h>
      <text:p text:style-name="P1">ID selectors are similar to class selectors. They select an element with the given ID, which is another attribute you place on an HTML element. The major difference between classes and IDs is that an element can only have <text:span text:style-name="Strong_20_Emphasis"><text:span text:style-name="T12">one</text:span></text:span> ID. It cannot be repeated on a single page and should not contain any whitespace:</text:p>
      <text:p text:style-name="P3"><text:span text:style-name="Source_20_Text"><text:span text:style-name="T8">&lt;!-- index.html --&gt;</text:span></text:span></text:p>
      <text:p text:style-name="P4"/>
      <text:p text:style-name="P3"><text:span text:style-name="Source_20_Text"><text:span text:style-name="T5">&lt;</text:span></text:span><text:span text:style-name="Source_20_Text"><text:span text:style-name="T9">div id</text:span></text:span><text:span text:style-name="Source_20_Text"><text:span text:style-name="T5">="</text:span></text:span><text:span text:style-name="Source_20_Text"><text:span text:style-name="T10">title</text:span></text:span><text:span text:style-name="Source_20_Text"><text:span text:style-name="T5">"&gt;</text:span></text:span><text:span text:style-name="Source_20_Text"><text:span text:style-name="T4">My Awesome 90's Page</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8">/* styles.css */</text:span></text:span></text:p>
      <text:p text:style-name="P4"><text:soft-page-break/></text:p>
      <text:p text:style-name="P3"><text:span text:style-name="Source_20_Text"><text:span text:style-name="T3">#title</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background-color</text:span></text:span><text:span text:style-name="Source_20_Text"><text:span text:style-name="T5">:</text:span></text:span><text:span text:style-name="Source_20_Text"><text:span text:style-name="T4"> red</text:span></text:span><text:span text:style-name="Source_20_Text"><text:span text:style-name="T5">;</text:span></text:span></text:p>
      <text:p text:style-name="P3"><text:span text:style-name="Source_20_Text"><text:span text:style-name="T5">}</text:span></text:span></text:p>
      <text:p text:style-name="P1">For IDs, instead of a period, we use a hashtag immediately followed by the case-sensitive value of the ID attribute. A common pitfall is people overusing the ID attribute when they don’t necessarily need to, and when classes will suffice. While there are cases where using an ID makes sense or is needed, such as taking advantage of specificity or having links redirect to a section on the current page, you should use IDs <text:span text:style-name="Strong_20_Emphasis"><text:span text:style-name="T12">sparingly</text:span></text:span> (if at all).</text:p>
      <text:h text:style-name="P2" text:outline-level="4"><text:a xlink:type="simple" xlink:href="https://www.theodinproject.com/lessons/foundations-intro-to-css#leading-digits-and-ids" text:style-name="Internet_20_link" text:visited-style-name="Visited_20_Internet_20_Link"><text:bookmark text:name="leading-digits-and-ids"/><text:span text:style-name="T1">Leading digits and IDs</text:span></text:a></text:h>
      <text:p text:style-name="P1"><text:span text:style-name="T11">Just like class selectors, ID selectors can’t start with a number. For example, if you give an element the ID </text:span><text:span text:style-name="Source_20_Text"><text:span text:style-name="T2">7itle</text:span></text:span><text:span text:style-name="T11">, the selector </text:span><text:span text:style-name="Source_20_Text"><text:span text:style-name="T2">#7itle</text:span></text:span><text:span text:style-name="T11"> won’t work - it’s not a valid CSS selector.</text:span></text:p>
      <text:h text:style-name="P2" text:outline-level="4"><text:a xlink:type="simple" xlink:href="https://www.theodinproject.com/lessons/foundations-intro-to-css#the-grouping-selector" text:style-name="Internet_20_link" text:visited-style-name="Visited_20_Internet_20_Link"><text:bookmark text:name="the-grouping-selector"/><text:span text:style-name="T1">The grouping selector</text:span></text:a></text:h>
      <text:p text:style-name="P1">What if we have two groups of elements that share some of their style declarations?</text:p>
      <text:p text:style-name="P3"><text:span text:style-name="Source_20_Text"><text:span text:style-name="T3">.read</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white</text:span></text:span><text:span text:style-name="Source_20_Text"><text:span text:style-name="T5">;</text:span></text:span></text:p>
      <text:p text:style-name="P3"><text:span text:style-name="Source_20_Text"><text:span text:style-name="T6"><text:s text:c="2"/></text:span></text:span><text:span text:style-name="Source_20_Text"><text:span text:style-name="T7">background-color</text:span></text:span><text:span text:style-name="Source_20_Text"><text:span text:style-name="T5">:</text:span></text:span><text:span text:style-name="Source_20_Text"><text:span text:style-name="T4"> black</text:span></text:span><text:span text:style-name="Source_20_Text"><text:span text:style-name="T5">;</text:span></text:span></text:p>
      <text:p text:style-name="P3"><text:span text:style-name="Source_20_Text"><text:span text:style-name="T6"><text:s text:c="2"/></text:span></text:span><text:span text:style-name="Source_20_Text"><text:span text:style-name="T8">/* several unique declarations */</text:span></text:span></text:p>
      <text:p text:style-name="P3"><text:span text:style-name="Source_20_Text"><text:span text:style-name="T5">}</text:span></text:span></text:p>
      <text:p text:style-name="P4"/>
      <text:p text:style-name="P3"><text:span text:style-name="Source_20_Text"><text:span text:style-name="T3">.unread</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white</text:span></text:span><text:span text:style-name="Source_20_Text"><text:span text:style-name="T5">;</text:span></text:span></text:p>
      <text:p text:style-name="P3"><text:span text:style-name="Source_20_Text"><text:span text:style-name="T6"><text:s text:c="2"/></text:span></text:span><text:span text:style-name="Source_20_Text"><text:span text:style-name="T7">background-color</text:span></text:span><text:span text:style-name="Source_20_Text"><text:span text:style-name="T5">:</text:span></text:span><text:span text:style-name="Source_20_Text"><text:span text:style-name="T4"> black</text:span></text:span><text:span text:style-name="Source_20_Text"><text:span text:style-name="T5">;</text:span></text:span></text:p>
      <text:p text:style-name="P3"><text:span text:style-name="Source_20_Text"><text:span text:style-name="T6"><text:s text:c="2"/></text:span></text:span><text:span text:style-name="Source_20_Text"><text:span text:style-name="T8">/* several unique declarations */</text:span></text:span></text:p>
      <text:p text:style-name="P3"><text:span text:style-name="Source_20_Text"><text:span text:style-name="T5">}</text:span></text:span></text:p>
      <text:p text:style-name="P1"><text:soft-page-break/>Both our <text:span text:style-name="Source_20_Text"><text:span text:style-name="T2">.read</text:span></text:span> and <text:span text:style-name="Source_20_Text"><text:span text:style-name="T2">.unread</text:span></text:span> selectors share the <text:span text:style-name="Source_20_Text"><text:span text:style-name="T2">color: white;</text:span></text:span> and <text:span text:style-name="Source_20_Text"><text:span text:style-name="T2">background-color: black;</text:span></text:span> declarations, but otherwise have several of their own unique declarations. To cut down on the repetition, we can group these two selectors together as a comma-separated list:</text:p>
      <text:p text:style-name="P3"><text:span text:style-name="Source_20_Text"><text:span text:style-name="T3">.read,</text:span></text:span></text:p>
      <text:p text:style-name="P3"><text:span text:style-name="Source_20_Text"><text:span text:style-name="T3">.unread</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white</text:span></text:span><text:span text:style-name="Source_20_Text"><text:span text:style-name="T5">;</text:span></text:span></text:p>
      <text:p text:style-name="P3"><text:span text:style-name="Source_20_Text"><text:span text:style-name="T6"><text:s text:c="2"/></text:span></text:span><text:span text:style-name="Source_20_Text"><text:span text:style-name="T7">background-color</text:span></text:span><text:span text:style-name="Source_20_Text"><text:span text:style-name="T5">:</text:span></text:span><text:span text:style-name="Source_20_Text"><text:span text:style-name="T4"> black</text:span></text:span><text:span text:style-name="Source_20_Text"><text:span text:style-name="T5">;</text:span></text:span></text:p>
      <text:p text:style-name="P3"><text:span text:style-name="Source_20_Text"><text:span text:style-name="T5">}</text:span></text:span></text:p>
      <text:p text:style-name="P4"/>
      <text:p text:style-name="P3"><text:span text:style-name="Source_20_Text"><text:span text:style-name="T3">.read</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8">/* several unique declarations */</text:span></text:span></text:p>
      <text:p text:style-name="P3"><text:span text:style-name="Source_20_Text"><text:span text:style-name="T5">}</text:span></text:span></text:p>
      <text:p text:style-name="P4"/>
      <text:p text:style-name="P3"><text:span text:style-name="Source_20_Text"><text:span text:style-name="T3">.unread</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8">/* several unique declarations */</text:span></text:span></text:p>
      <text:p text:style-name="P3"><text:span text:style-name="Source_20_Text"><text:span text:style-name="T5">}</text:span></text:span></text:p>
      <text:p text:style-name="P1">Both of the examples above (with and without grouping) will have the same result, but the second example reduces the repetition of declarations and makes it easier to edit either the <text:span text:style-name="Source_20_Text"><text:span text:style-name="T2">color</text:span></text:span> or <text:span text:style-name="Source_20_Text"><text:span text:style-name="T2">background-color</text:span></text:span> for both classes at once.</text:p>
      <text:h text:style-name="P2" text:outline-level="4"><text:a xlink:type="simple" xlink:href="https://www.theodinproject.com/lessons/foundations-intro-to-css#chaining-selectors" text:style-name="Internet_20_link" text:visited-style-name="Visited_20_Internet_20_Link"><text:bookmark text:name="chaining-selectors"/><text:span text:style-name="T1">Chaining selectors</text:span></text:a></text:h>
      <text:p text:style-name="P1">Another way to use selectors is to chain them as a list without any separation. Let’s say we had the following HTML:</text:p>
      <text:p text:style-name="P3"><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subsection header</text:span></text:span><text:span text:style-name="Source_20_Text"><text:span text:style-name="T5">"&gt;</text:span></text:span><text:span text:style-name="Source_20_Text"><text:span text:style-name="T4">Latest Posts</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p class</text:span></text:span><text:span text:style-name="Source_20_Text"><text:span text:style-name="T5">="</text:span></text:span><text:span text:style-name="Source_20_Text"><text:span text:style-name="T10">subsection preview</text:span></text:span><text:span text:style-name="Source_20_Text"><text:span text:style-name="T5">"&gt;</text:span></text:span><text:span text:style-name="Source_20_Text"><text:span text:style-name="T4">This is where a preview for a post might go.</text:span></text:span><text:span text:style-name="Source_20_Text"><text:span text:style-name="T5">&lt;/</text:span></text:span><text:span text:style-name="Source_20_Text"><text:span text:style-name="T9">p</text:span></text:span><text:span text:style-name="Source_20_Text"><text:span text:style-name="T5">&gt;</text:span></text:span></text:p>
      <text:p text:style-name="P3"><text:span text:style-name="Source_20_Text"><text:span text:style-name="T5">&lt;/</text:span></text:span><text:span text:style-name="Source_20_Text"><text:span text:style-name="T9">div</text:span></text:span><text:span text:style-name="Source_20_Text"><text:span text:style-name="T5">&gt;</text:span></text:span></text:p>
      <text:p text:style-name="P1"><text:soft-page-break/>We have two elements with the <text:span text:style-name="Source_20_Text"><text:span text:style-name="T2">subsection</text:span></text:span> class that have some sort of unique styles, but what if we only want to apply a separate rule to the element that also has <text:span text:style-name="Source_20_Text"><text:span text:style-name="T2">header</text:span></text:span> as a second class? Well, we could chain both the class selectors together in our CSS like so:</text:p>
      <text:p text:style-name="P3"><text:span text:style-name="Source_20_Text"><text:span text:style-name="T3">.subsection.header</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red</text:span></text:span><text:span text:style-name="Source_20_Text"><text:span text:style-name="T5">;</text:span></text:span></text:p>
      <text:p text:style-name="P3"><text:span text:style-name="Source_20_Text"><text:span text:style-name="T5">}</text:span></text:span></text:p>
      <text:p text:style-name="P1">What <text:span text:style-name="Source_20_Text"><text:span text:style-name="T2">.subsection.header</text:span></text:span> does is it selects any element that has both the <text:span text:style-name="Source_20_Text"><text:span text:style-name="T2">subsection</text:span></text:span> <text:span text:style-name="Emphasis"><text:span text:style-name="T13">and</text:span></text:span> <text:span text:style-name="Source_20_Text"><text:span text:style-name="T2">header</text:span></text:span> classes. Notice how there isn’t any space between the <text:span text:style-name="Source_20_Text"><text:span text:style-name="T2">.subsection</text:span></text:span> and <text:span text:style-name="Source_20_Text"><text:span text:style-name="T2">.header</text:span></text:span> class selectors. This syntax basically works for chaining any combination of selectors, except for chaining more than one <text:a xlink:type="simple" xlink:href="https://www.theodinproject.com/lessons/foundations-intro-to-css#type-selectors" text:style-name="Internet_20_link" text:visited-style-name="Visited_20_Internet_20_Link"><text:span text:style-name="T14">type selector</text:span></text:a>.</text:p>
      <text:p text:style-name="P5">This can also be used to chain a class and an ID, as shown below:</text:p>
      <text:p text:style-name="P3"><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subsection header</text:span></text:span><text:span text:style-name="Source_20_Text"><text:span text:style-name="T5">"&gt;</text:span></text:span><text:span text:style-name="Source_20_Text"><text:span text:style-name="T4">Latest Posts</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p class</text:span></text:span><text:span text:style-name="Source_20_Text"><text:span text:style-name="T5">="</text:span></text:span><text:span text:style-name="Source_20_Text"><text:span text:style-name="T10">subsection</text:span></text:span><text:span text:style-name="Source_20_Text"><text:span text:style-name="T5">"</text:span></text:span><text:span text:style-name="Source_20_Text"><text:span text:style-name="T9"> id</text:span></text:span><text:span text:style-name="Source_20_Text"><text:span text:style-name="T5">="</text:span></text:span><text:span text:style-name="Source_20_Text"><text:span text:style-name="T10">preview</text:span></text:span><text:span text:style-name="Source_20_Text"><text:span text:style-name="T5">"&gt;</text:span></text:span></text:p>
      <text:p text:style-name="P4"><text:span text:style-name="Source_20_Text"><text:span text:style-name="T6"><text:s text:c="4"/></text:span></text:span><text:span text:style-name="Source_20_Text"><text:span text:style-name="T4">This is where a preview for a post might go.</text:span></text:span></text:p>
      <text:p text:style-name="P3"><text:span text:style-name="Source_20_Text"><text:span text:style-name="T6"><text:s text:c="2"/></text:span></text:span><text:span text:style-name="Source_20_Text"><text:span text:style-name="T5">&lt;/</text:span></text:span><text:span text:style-name="Source_20_Text"><text:span text:style-name="T9">p</text:span></text:span><text:span text:style-name="Source_20_Text"><text:span text:style-name="T5">&gt;</text:span></text:span></text:p>
      <text:p text:style-name="P3"><text:span text:style-name="Source_20_Text"><text:span text:style-name="T5">&lt;/</text:span></text:span><text:span text:style-name="Source_20_Text"><text:span text:style-name="T9">div</text:span></text:span><text:span text:style-name="Source_20_Text"><text:span text:style-name="T5">&gt;</text:span></text:span></text:p>
      <text:p text:style-name="P5">You can take the two elements above and combine them with the following:</text:p>
      <text:p text:style-name="P3"><text:span text:style-name="Source_20_Text"><text:span text:style-name="T3">.subsection.header</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red</text:span></text:span><text:span text:style-name="Source_20_Text"><text:span text:style-name="T5">;</text:span></text:span></text:p>
      <text:p text:style-name="P3"><text:span text:style-name="Source_20_Text"><text:span text:style-name="T5">}</text:span></text:span></text:p>
      <text:p text:style-name="P4"/>
      <text:p text:style-name="P3"><text:span text:style-name="Source_20_Text"><text:span text:style-name="T3">.subsection#preview</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7">color</text:span></text:span><text:span text:style-name="Source_20_Text"><text:span text:style-name="T5">:</text:span></text:span><text:span text:style-name="Source_20_Text"><text:span text:style-name="T4"> blue</text:span></text:span><text:span text:style-name="Source_20_Text"><text:span text:style-name="T5">;</text:span></text:span></text:p>
      <text:p text:style-name="P3"><text:span text:style-name="Source_20_Text"><text:span text:style-name="T5">}</text:span></text:span></text:p>
      <text:p text:style-name="P1"><text:soft-page-break/>In general, you can’t chain more than one type selector since an element can’t be two different types at once. For example, chaining two type selectors like <text:span text:style-name="Source_20_Text"><text:span text:style-name="T2">div</text:span></text:span> and <text:span text:style-name="Source_20_Text"><text:span text:style-name="T2">p</text:span></text:span> would give us the selector <text:span text:style-name="Source_20_Text"><text:span text:style-name="T2">divp</text:span></text:span>, which wouldn’t work since the selector would try to find a literal <text:span text:style-name="Source_20_Text"><text:span text:style-name="T2">&lt;divp&gt;</text:span></text:span> element, which doesn’t exist.</text:p>
      <text:h text:style-name="P2" text:outline-level="4"><text:a xlink:type="simple" xlink:href="https://www.theodinproject.com/lessons/foundations-intro-to-css#descendant-combinator" text:style-name="Internet_20_link" text:visited-style-name="Visited_20_Internet_20_Link"><text:bookmark text:name="descendant-combinator"/><text:span text:style-name="T1">Descendant combinator</text:span></text:a></text:h>
      <text:p text:style-name="P1">Combinators allow us to combine multiple selectors differently than either grouping or chaining them, as they show a relationship between the selectors. There are four types of combinators in total, but for right now we’re going to only show you the <text:span text:style-name="Strong_20_Emphasis"><text:span text:style-name="T12">descendant combinator</text:span></text:span>, which is represented in CSS by a single space between selectors. <text:bookmark text:name="descendant-combinator-description"/><text:span text:style-name="T13">A descendant combinator will only cause elements that match the last selector to be selected if they also have an ancestor (parent, grandparent, etc.) that matches the previous selector.</text:span></text:p>
      <text:p text:style-name="P1">So something like <text:span text:style-name="Source_20_Text"><text:span text:style-name="T2">.ancestor .child</text:span></text:span> would select an element with the class <text:span text:style-name="Source_20_Text"><text:span text:style-name="T2">child</text:span></text:span> if it has an ancestor with the class <text:span text:style-name="Source_20_Text"><text:span text:style-name="T2">ancestor</text:span></text:span>. Another way to think of it is that <text:span text:style-name="Source_20_Text"><text:span text:style-name="T2">child</text:span></text:span> will only be selected if it is nested inside <text:span text:style-name="Source_20_Text"><text:span text:style-name="T2">ancestor</text:span></text:span>, regardless of how deep that nesting is. Take a quick look at the example below and see if you can tell which elements would be selected based on the CSS rule provided:</text:p>
      <text:p text:style-name="P3"><text:span text:style-name="Source_20_Text"><text:span text:style-name="T8">&lt;!-- index.html --&gt;</text:span></text:span></text:p>
      <text:p text:style-name="P4"/>
      <text:p text:style-name="P3"><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ancestor</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contents</text:span></text:span><text:span text:style-name="Source_20_Text"><text:span text:style-name="T5">"&gt;</text:span></text:span></text:p>
      <text:p text:style-name="P3"><text:span text:style-name="Source_20_Text"><text:span text:style-name="T6"><text:s text:c="4"/></text:span></text:span><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contents</text:span></text:span><text:span text:style-name="Source_20_Text"><text:span text:style-name="T5">"&gt;&lt;/</text:span></text:span><text:span text:style-name="Source_20_Text"><text:span text:style-name="T9">div</text:span></text:span><text:span text:style-name="Source_20_Text"><text:span text:style-name="T5">&gt;</text:span></text:span></text:p>
      <text:p text:style-name="P3"><text:span text:style-name="Source_20_Text"><text:span text:style-name="T6"><text:s text:c="2"/></text:span></text:span><text:span text:style-name="Source_20_Text"><text:span text:style-name="T5">&lt;/</text:span></text:span><text:span text:style-name="Source_20_Text"><text:span text:style-name="T9">div</text:span></text:span><text:span text:style-name="Source_20_Text"><text:span text:style-name="T5">&gt;</text:span></text:span></text:p>
      <text:p text:style-name="P3"><text:span text:style-name="Source_20_Text"><text:span text:style-name="T5">&lt;/</text:span></text:span><text:span text:style-name="Source_20_Text"><text:span text:style-name="T9">div</text:span></text:span><text:span text:style-name="Source_20_Text"><text:span text:style-name="T5">&gt;</text:span></text:span></text:p>
      <text:p text:style-name="P4"/>
      <text:p text:style-name="P3"><text:span text:style-name="Source_20_Text"><text:span text:style-name="T5">&lt;</text:span></text:span><text:span text:style-name="Source_20_Text"><text:span text:style-name="T9">div class</text:span></text:span><text:span text:style-name="Source_20_Text"><text:span text:style-name="T5">="</text:span></text:span><text:span text:style-name="Source_20_Text"><text:span text:style-name="T10">contents</text:span></text:span><text:span text:style-name="Source_20_Text"><text:span text:style-name="T5">"&gt;&lt;/</text:span></text:span><text:span text:style-name="Source_20_Text"><text:span text:style-name="T9">div</text:span></text:span><text:span text:style-name="Source_20_Text"><text:span text:style-name="T5">&gt;</text:span></text:span></text:p>
      <text:p text:style-name="P3"><text:span text:style-name="Source_20_Text"><text:span text:style-name="T8">/* styles.css */</text:span></text:span></text:p>
      <text:p text:style-name="P4"/>
      <text:p text:style-name="P3"><text:span text:style-name="Source_20_Text"><text:span text:style-name="T3">.ancestor .contents</text:span></text:span><text:span text:style-name="Source_20_Text"><text:span text:style-name="T4"> </text:span></text:span><text:span text:style-name="Source_20_Text"><text:span text:style-name="T5">{</text:span></text:span></text:p>
      <text:p text:style-name="P3"><text:span text:style-name="Source_20_Text"><text:span text:style-name="T6"><text:s text:c="2"/></text:span></text:span><text:span text:style-name="Source_20_Text"><text:span text:style-name="T8">/* some declarations */</text:span></text:span></text:p>
      <text:p text:style-name="P3"><text:soft-page-break/><text:span text:style-name="Source_20_Text"><text:span text:style-name="T5">}</text:span></text:span></text:p>
      <text:p text:style-name="P1">In the above example, the first two elements with the <text:span text:style-name="Source_20_Text"><text:span text:style-name="T2">contents</text:span></text:span> class (on lines 4 and 5) would be selected, but the last element (on line 9) wouldn’t be. Was your guess correct?</text:p>
      <text:p text:style-name="P1">There’s really no limit to how many combinators you can add to a rule, so <text:span text:style-name="Source_20_Text"><text:span text:style-name="T2">.one .two .three .four</text:span></text:span> would be totally valid. This would just select an element that has a class of <text:span text:style-name="Source_20_Text"><text:span text:style-name="T2">four</text:span></text:span> if it has an ancestor with a class of <text:span text:style-name="Source_20_Text"><text:span text:style-name="T2">three</text:span></text:span>, and if that ancestor has its own ancestor with a class of <text:span text:style-name="Source_20_Text"><text:span text:style-name="T2">two</text:span></text:span>, and so on. You generally want to avoid trying to select elements that need this level of nesting, though, as it can get pretty confusing and long, and it can cause issues when it comes to specificity.</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2T10:20:23.806390165</meta:creation-date>
    <dc:date>2026-06-12T10:21:05.941962468</dc:date>
    <meta:editing-duration>PT43S</meta:editing-duration>
    <meta:editing-cycles>1</meta:editing-cycles>
    <meta:document-statistic meta:table-count="0" meta:image-count="0" meta:object-count="0" meta:page-count="7" meta:paragraph-count="110" meta:word-count="1240" meta:character-count="7357" meta:non-whitespace-character-count="6171"/>
    <meta:generator>LibreOffice/26.2.4.2$Linux_X86_64 LibreOffice_project/c44d3140fc62714965bf5d98735e0d79ba4b1ebd</meta:generator>
  </office:meta>
</office:document-meta>
</file>