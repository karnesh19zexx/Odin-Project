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0E1D962162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20%" fo:text-indent="0in" style:auto-text-indent="false" fo:padding="0.0193in" fo:border="0.06pt solid #000000"/>
      <style:text-properties fo:font-size="22.5pt" fo:font-weight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.0193in" fo:border="0.06pt solid #000000"/>
      <style:text-properties fo:font-variant="normal" fo:text-transform="none" style:font-name="Inter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.0193in" fo:border="0.06pt solid #000000"/>
      <style:text-properties fo:font-variant="normal" fo:text-transform="none" fo:letter-spacing="normal" style:text-underline-style="solid" style:text-underline-width="auto" style:text-underline-color="font-color" loext:padding="0.0193in" loext:border="0.06pt solid #000000"/>
    </style:style>
    <style:style style:name="P4" style:family="paragraph" style:parent-style-name="Heading_20_4">
      <style:paragraph-properties fo:margin-left="0in" fo:margin-right="0in" fo:margin-top="0in" fo:margin-bottom="0in" style:contextual-spacing="false" fo:line-height="150%" fo:orphans="2" fo:widows="2" fo:text-indent="0in" style:auto-text-indent="false" fo:padding="0.0193in" fo:border="0.06pt solid #000000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.0193in" fo:border="0.06pt solid #000000"/>
    </style:style>
    <style:style style:name="T1" style:family="text">
      <style:text-properties fo:font-variant="normal" fo:text-transform="none" style:text-line-through-style="none" style:text-line-through-type="none" style:font-name="Inter" fo:letter-spacing="normal" fo:font-style="normal" style:text-underline-style="none" fo:font-weight="bold" style:text-blinking="false" loext:padding="0.0193in" loext:border="0.06pt solid #000000"/>
    </style:style>
    <style:style style:name="T2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bold" style:text-blinking="false" loext:padding="0.0193in" loext:border="0.06pt solid #000000"/>
    </style:style>
    <style:style style:name="T3" style:family="text">
      <style:text-properties fo:font-variant="normal" fo:text-transform="none" style:font-name="Inter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font-family="ui-monospace, SFMono-Regular, Menlo, Monaco, Consolas, 'Liberation Mono', 'Courier New', monospace" fo:font-size="12pt" fo:letter-spacing="normal" fo:font-style="normal" fo:font-weight="normal" loext:padding-left="0.0417in" loext:padding-right="0in" loext:padding-top="0.0417in" loext:padding-bottom="0.0417in" loext:border-left="0.06pt solid #000000" loext:border-right="none" loext:border-top="0.06pt solid #000000" loext:border-bottom="0.06pt solid #000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 to CSS</text:h>
      <text:h text:style-name="Heading_20_3" text:outline-level="3"><text:a xlink:type="simple" xlink:href="https://www.theodinproject.com/lessons/foundations-intro-to-css#basic-syntax" text:style-name="Internet_20_link" text:visited-style-name="Visited_20_Internet_20_Link"><text:bookmark text:name="basic-syntax"/><text:span text:style-name="T1">Basic syntax</text:span></text:a></text:h>
      <text:p text:style-name="P2">At the most basic level, CSS is made up of various rules. Each rule is made up of a selector (more on this in a bit) and a semicolon-separated list of declarations, with each of those declarations being made up of a property–value pair.</text:p>
      <text:p text:style-name="P3"><draw:a xlink:type="simple" xlink:href="https://cdn.statically.io/gh/TheOdinProject/curriculum/05ce472eabf8e04eeb2cc9139e66db884074fd7d/foundations/html_css/css-foundations/imgs/00.jpg"><draw:frame draw:style-name="fr1" draw:name="Image1" text:anchor-type="as-char" svg:width="3.1457in" svg:height="2.3646in" draw:z-index="0"><draw:image xlink:href="Pictures/100000000000012C000000E1D9621622.jpg" xlink:type="simple" xlink:show="embed" xlink:actuate="onLoad" draw:mime-type="image/jpeg"/><svg:title>Basic CSS syntax</svg:title></draw:frame></draw:a></text:p>
      <text:h text:style-name="P4" text:outline-level="4"><text:a xlink:type="simple" xlink:href="https://www.theodinproject.com/lessons/foundations-intro-to-css#semantic-html" text:style-name="Internet_20_link" text:visited-style-name="Visited_20_Internet_20_Link"><text:bookmark text:name="semantic-html"/><text:span text:style-name="T2">Semantic HTML</text:span></text:a></text:h>
      <text:p text:style-name="P5"><text:span text:style-name="T3">A </text:span><text:span text:style-name="Source_20_Text"><text:span text:style-name="T4">&lt;div&gt;</text:span></text:span><text:span text:style-name="T3"> is one of the basic HTML elements. It is an empty container. In general, it is best to use other tags such as </text:span><text:span text:style-name="Source_20_Text"><text:span text:style-name="T4">&lt;h1&gt;</text:span></text:span><text:span text:style-name="T3"> or </text:span><text:span text:style-name="Source_20_Text"><text:span text:style-name="T4">&lt;p&gt;</text:span></text:span><text:span text:style-name="T3"> for content in your projects, but as we learn more about CSS you’ll find that there are many cases where the thing you need is just a container for other elements. Many of our exercises use plain</text:span><text:span text:style-name="Source_20_Text"><text:span text:style-name="T4">&lt;div&gt;</text:span></text:span><text:span text:style-name="T3">s for simplicity. Later lessons will go into much more depth about when it is appropriate to use the various HTML elements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0:16:01.843827775</meta:creation-date>
    <dc:date>2026-06-12T10:18:04.403209835</dc:date>
    <meta:editing-duration>PT2M4S</meta:editing-duration>
    <meta:editing-cycles>1</meta:editing-cycles>
    <meta:generator>LibreOffice/26.2.4.2$Linux_X86_64 LibreOffice_project/c44d3140fc62714965bf5d98735e0d79ba4b1ebd</meta:generator>
    <meta:document-statistic meta:table-count="0" meta:image-count="1" meta:object-count="0" meta:page-count="1" meta:paragraph-count="6" meta:word-count="138" meta:character-count="726" meta:non-whitespace-character-count="594"/>
  </office:meta>
</office:document-meta>
</file>