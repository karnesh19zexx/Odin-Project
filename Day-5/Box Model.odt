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Inter" svg:font-family="Inter, '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list-style-name="L1">
      <style:paragraph-properties fo:margin-left="0in" fo:margin-right="0in" fo:margin-top="0in" fo:margin-bottom="0in" style:contextual-spacing="false" fo:orphans="2" fo:widows="2" fo:text-indent="0in" style:auto-text-indent="false" fo:padding="0.0193in" fo:border="0.06pt solid #000000"/>
      <style:text-properties fo:font-variant="normal" fo:text-transform="none" style:font-name="Inter" fo:font-size="22.5pt" fo:letter-spacing="normal" fo:font-style="normal" fo:font-weight="bold" loext:padding="0.0193in" loext:border="0.06pt solid #000000"/>
    </style:style>
    <style:style style:name="P2" style:family="paragraph" style:parent-style-name="Heading_20_3">
      <style:paragraph-properties fo:margin-left="0in" fo:margin-right="0in" fo:margin-top="0in" fo:margin-bottom="0in" style:contextual-spacing="false" fo:line-height="160%" fo:orphans="65" fo:text-indent="0in" style:auto-text-indent="false" fo:padding="0.0193in" fo:border="0.06pt solid #000000"/>
      <style:text-properties style:font-name="Inter" fo:font-size="12pt" fo:font-weight="normal"/>
    </style:style>
    <style:style style:name="P3" style:family="paragraph" style:parent-style-name="Text_20_body">
      <style:paragraph-properties fo:margin-left="0in" fo:margin-right="0in" fo:margin-top="0in" fo:margin-bottom="0in" style:contextual-spacing="false" fo:orphans="65" fo:text-indent="0in" style:auto-text-indent="false" fo:padding="0.0193in" fo:border="0.06pt solid #000000"/>
      <style:text-properties style:font-name="Inter"/>
    </style:style>
    <style:style style:name="P4" style:family="paragraph" style:parent-style-name="Text_20_body">
      <style:paragraph-properties fo:margin-left="0in" fo:margin-right="0in" fo:margin-top="0in" fo:margin-bottom="0in" style:contextual-spacing="false" fo:orphans="65" fo:text-indent="0in" style:auto-text-indent="false" fo:padding="0.0193in" fo:border="0.06pt solid #000000"/>
      <style:text-properties style:font-name="Inter" loext:padding="0.0193in" loext:border="0.06pt solid #000000"/>
    </style:style>
    <style:style style:name="P5" style:family="paragraph" style:parent-style-name="Text_20_body" style:list-style-name="L2">
      <style:paragraph-properties fo:margin-left="0in" fo:margin-right="0in" fo:margin-top="0in" fo:margin-bottom="0in" style:contextual-spacing="false" fo:orphans="65" fo:text-indent="0in" style:auto-text-indent="false" fo:padding="0.0193in" fo:border="0.06pt solid #000000"/>
      <style:text-properties style:font-name="Inter"/>
    </style:style>
    <style:style style:name="P6" style:family="paragraph" style:parent-style-name="Preformatted_20_Text">
      <style:paragraph-properties fo:margin-left="0in" fo:margin-right="0in" fo:margin-top="0in" fo:margin-bottom="0in" style:contextual-spacing="false" fo:line-height="170%" fo:orphans="65" fo:text-indent="0in" style:auto-text-indent="false" fo:padding-left="0.0193in" fo:padding-right="0in" fo:padding-top="0.0193in" fo:padding-bottom="0.0193in" fo:border-left="0.06pt solid #000000" fo:border-right="none" fo:border-top="0.06pt solid #000000" fo:border-bottom="0.06pt solid #000000"/>
      <style:text-properties style:font-name="Inter" fo:font-size="12pt"/>
    </style:style>
    <style:style style:name="P7" style:family="paragraph" style:parent-style-name="Text_20_body">
      <style:paragraph-properties fo:margin-left="0in" fo:margin-right="0in" fo:margin-top="0in" fo:margin-bottom="0in" style:contextual-spacing="false" fo:orphans="65" fo:text-indent="0in" style:auto-text-indent="false" fo:padding="0.0193in" fo:border="0.06pt solid #000000"/>
      <style:text-properties style:font-name="Inter" style:text-underline-style="solid" style:text-underline-width="auto" style:text-underline-color="font-color" loext:padding="0.0193in" loext:border="0.06pt solid #000000"/>
    </style:style>
    <style:style style:name="P8" style:family="paragraph" style:parent-style-name="Text_20_body" style:list-style-name="L3">
      <style:paragraph-properties fo:margin-left="0in" fo:margin-right="0in" fo:margin-top="0in" fo:margin-bottom="0in" style:contextual-spacing="false" fo:orphans="65" fo:text-indent="0in" style:auto-text-indent="false" fo:padding="0.0193in" fo:border="0.06pt solid #000000"/>
      <style:text-properties style:font-name="Inter"/>
    </style:style>
    <style:style style:name="T1" style:family="text">
      <style:text-properties style:text-line-through-style="none" style:text-line-through-type="none" style:text-underline-style="none" fo:font-weight="bold" style:text-blinking="false" loext:padding="0.0193in" loext:border="0.06pt solid #000000"/>
    </style:style>
    <style:style style:name="T2" style:family="text">
      <style:text-properties loext:padding="0.0193in" loext:border="0.06pt solid #000000"/>
    </style:style>
    <style:style style:name="T3" style:family="text">
      <style:text-properties style:text-underline-style="solid" style:text-underline-width="auto" style:text-underline-color="font-color" fo:font-weight="bold" loext:padding="0.0193in" loext:border="0.06pt solid #000000"/>
    </style:style>
    <style:style style:name="T4" style:family="text">
      <style:text-properties fo:font-family="ui-monospace, SFMono-Regular, Menlo, Monaco, Consolas, 'Liberation Mono', 'Courier New', monospace" fo:font-weight="normal" loext:padding-left="0.0417in" loext:padding-right="0in" loext:padding-top="0.0417in" loext:padding-bottom="0.0417in" loext:border-left="0.06pt solid #000000" loext:border-right="none" loext:border-top="0.06pt solid #000000" loext:border-bottom="0.06pt solid #000000"/>
    </style:style>
    <style:style style:name="T5" style:family="text">
      <style:text-properties fo:color="#cc99cd" loext:opacity="100%" fo:font-family="Consolas, Monaco, 'Ubuntu Mono', monospace" fo:font-weight="normal" fo:background-color="transparent" loext:char-shading-value="0" loext:padding="0.0193in" loext:border="0.06pt solid #000000"/>
    </style:style>
    <style:style style:name="T6" style:family="text">
      <style:text-properties fo:color="#cccccc" loext:opacity="100%" fo:font-family="Consolas, Monaco, 'Ubuntu Mono', monospace" fo:font-weight="normal" fo:background-color="transparent" loext:char-shading-value="0" loext:padding-left="0.0193in" loext:padding-right="0in" loext:padding-top="0.0311in" loext:padding-bottom="0.0193in" loext:border-left="0.06pt solid #000000" loext:border-right="none" loext:border-top="0.06pt solid #000000" loext:border-bottom="0.06pt solid #000000"/>
    </style:style>
    <style:style style:name="T7" style:family="text">
      <style:text-properties fo:color="#cccccc" loext:opacity="100%" fo:font-family="Consolas, Monaco, 'Ubuntu Mono', monospace" fo:font-weight="normal" fo:background-color="transparent" loext:char-shading-value="0" loext:padding="0.0193in" loext:border="0.06pt solid #000000"/>
    </style:style>
    <style:style style:name="T8" style:family="text">
      <style:text-properties fo:color="#cccccc" loext:opacity="100%" fo:background-color="transparent" loext:char-shading-value="0" loext:padding-left="0.0193in" loext:padding-right="0in" loext:padding-top="0.0311in" loext:padding-bottom="0.0193in" loext:border-left="0.06pt solid #000000" loext:border-right="none" loext:border-top="0.06pt solid #000000" loext:border-bottom="0.06pt solid #000000"/>
    </style:style>
    <style:style style:name="T9" style:family="text">
      <style:text-properties fo:color="#f8c555" loext:opacity="100%" fo:font-family="Consolas, Monaco, 'Ubuntu Mono', monospace" fo:font-weight="normal" fo:background-color="transparent" loext:char-shading-value="0" loext:padding="0.0193in" loext:border="0.06pt solid #000000"/>
    </style:style>
    <style:style style:name="fr1" style:family="graphic" style:parent-style-name="Graphics">
      <style:graphic-properties fo:margin-left="0in" fo:margin-right="0in" fo:margin-top="0in" fo:margin-bottom="0in" style:vertical-pos="top" style:vertical-rel="baseline" fo:padding="0.0193in" fo:border="0.06pt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h text:style-name="P1" text:outline-level="1">The Box Model</text:h>
        </text:list-item>
      </text:list>
      <text:h text:style-name="P2" text:outline-level="3"><text:a xlink:type="simple" xlink:href="https://www.theodinproject.com/lessons/foundations-the-box-model#introduction" text:style-name="Internet_20_link" text:visited-style-name="Visited_20_Internet_20_Link"><text:bookmark text:name="introduction"/><text:span text:style-name="T1">Introduction</text:span></text:a></text:h>
      <text:p text:style-name="P3"><text:span text:style-name="T2">Now that you understand the basic syntax of HTML and CSS, we’re going to get serious. The most important skills you need to master with CSS are </text:span><text:span text:style-name="Emphasis"><text:span text:style-name="T2">positioning</text:span></text:span><text:span text:style-name="T2"> and </text:span><text:span text:style-name="Emphasis"><text:span text:style-name="T2">layout</text:span></text:span><text:span text:style-name="T2">. Changing fonts and colors is a crucial skill, but being able to put things exactly where you want them on a webpage is even more crucial. After all, how many webpages can you find where absolutely every element is just stacked one on top of another?</text:span></text:p>
      <text:p text:style-name="P3"><text:span text:style-name="T2">Learning to position elements on a webpage is not that difficult once you understand just a few key concepts. Unfortunately, many learners race through learning HTML and CSS to get to JavaScript and end up missing these fundamental concepts. This leads to frustration and pain (</text:span><text:a xlink:type="simple" xlink:href="https://giphy.com/gifs/css-13FrpeVH09Zrb2" text:style-name="Internet_20_link" text:visited-style-name="Visited_20_Internet_20_Link"><text:span text:style-name="T3">and funny gifs</text:span></text:a><text:span text:style-name="T2">) because all the JavaScript skills in the world are meaningless if you can’t stick your elements on the page where you need them to be. So with that in mind, let’s get started.</text:span></text:p>
      <text:h text:style-name="P2" text:outline-level="3"><text:a xlink:type="simple" xlink:href="https://www.theodinproject.com/lessons/foundations-the-box-model#lesson-overview" text:style-name="Internet_20_link" text:visited-style-name="Visited_20_Internet_20_Link"><text:bookmark text:name="lesson-overview"/><text:span text:style-name="T1">Lesson overview</text:span></text:a></text:h>
      <text:p text:style-name="P4">This section contains a general overview of topics that you will learn in this lesson.</text:p>
      <text:list text:style-name="L2">
        <text:list-item>
          <text:p text:style-name="P5"><text:span text:style-name="T2">You’ll learn all about </text:span><text:span text:style-name="Emphasis"><text:span text:style-name="T2">the box model</text:span></text:span><text:span text:style-name="T2">.</text:span></text:p>
        </text:list-item>
        <text:list-item>
          <text:p text:style-name="P5"><text:span text:style-name="T2">You’ll learn how to make sure elements are just the right size with </text:span><text:span text:style-name="Source_20_Text"><text:span text:style-name="T4">margin</text:span></text:span><text:span text:style-name="T2">, </text:span><text:span text:style-name="Source_20_Text"><text:span text:style-name="T4">padding</text:span></text:span><text:span text:style-name="T2">, and </text:span><text:span text:style-name="Source_20_Text"><text:span text:style-name="T4">borders</text:span></text:span><text:span text:style-name="T2">.</text:span></text:p>
        </text:list-item>
      </text:list>
      <text:h text:style-name="P2" text:outline-level="3"><text:a xlink:type="simple" xlink:href="https://www.theodinproject.com/lessons/foundations-the-box-model#the-box-model" text:style-name="Internet_20_link" text:visited-style-name="Visited_20_Internet_20_Link"><text:bookmark text:name="the-box-model"/><text:span text:style-name="T1">The box model</text:span></text:a></text:h>
      <text:p text:style-name="P4">The first important concept that you need to understand to be successful in CSS is the box model. It isn’t complicated, but skipping over it now would cause you much frustration down the line.</text:p>
      <text:p text:style-name="P4">Every single thing on a webpage is a rectangular box. These boxes can have other boxes in them and can sit alongside one another. You can get a rough idea of how this works by applying an outline to every element on the page like this:</text:p>
      <text:p text:style-name="P6"><text:span text:style-name="Source_20_Text"><text:span text:style-name="T5">*</text:span></text:span><text:span text:style-name="Source_20_Text"><text:span text:style-name="T6"> </text:span></text:span><text:span text:style-name="Source_20_Text"><text:span text:style-name="T7">{</text:span></text:span></text:p>
      <text:p text:style-name="P6"><text:span text:style-name="Source_20_Text"><text:span text:style-name="T8"><text:s text:c="2"/></text:span></text:span><text:span text:style-name="Source_20_Text"><text:span text:style-name="T9">outline</text:span></text:span><text:span text:style-name="Source_20_Text"><text:span text:style-name="T7">:</text:span></text:span><text:span text:style-name="Source_20_Text"><text:span text:style-name="T6"> 2px solid red</text:span></text:span><text:span text:style-name="Source_20_Text"><text:span text:style-name="T7">;</text:span></text:span></text:p>
      <text:p text:style-name="P6"><text:soft-page-break/><text:span text:style-name="Source_20_Text"><text:span text:style-name="T7">}</text:span></text:span></text:p>
      <text:p text:style-name="P7"><draw:a xlink:type="simple" xlink:href="https://cdn.statically.io/gh/TheOdinProject/curriculum/c547923a86efaccb0fc71adf70fda2ea340b4cb1/foundations/html_css/css_foundations/the_box_model/imgs/boxes.png"><draw:frame draw:style-name="fr1" draw:name="Image1" text:anchor-type="as-char" svg:width="5.6252in" svg:height="4.1043in" draw:z-index="0"><draw:image xlink:href="https://cdn.statically.io/gh/TheOdinProject/curriculum/c547923a86efaccb0fc71adf70fda2ea340b4cb1/foundations/html_css/css_foundations/the_box_model/imgs/boxes.png" xlink:type="simple" xlink:show="embed" xlink:actuate="onLoad" draw:mime-type="image/png"/><svg:title>boxes</svg:title></draw:frame></draw:a></text:p>
      <text:p text:style-name="P3"><text:span text:style-name="T2">You can use the browser’s inspector to add the CSS above to this web page if you want, by clicking the </text:span><text:span text:style-name="Source_20_Text"><text:span text:style-name="T4">+</text:span></text:span><text:span text:style-name="T2"> button in the top right of the “Styles” panel within the “Elements” tab. Boxes in boxes!</text:span></text:p>
      <text:p text:style-name="P7"><text:soft-page-break/><draw:a xlink:type="simple" xlink:href="https://cdn.statically.io/gh/TheOdinProject/curriculum/c547923a86efaccb0fc71adf70fda2ea340b4cb1/foundations/html_css/css_foundations/the_box_model/imgs/odin-lined.png"><draw:frame draw:style-name="fr1" draw:name="Image2" text:anchor-type="as-char" svg:width="11.8228in" svg:height="6.8752in" draw:z-index="1"><draw:image xlink:href="https://cdn.statically.io/gh/TheOdinProject/curriculum/c547923a86efaccb0fc71adf70fda2ea340b4cb1/foundations/html_css/css_foundations/the_box_model/imgs/odin-lined.png" xlink:type="simple" xlink:show="embed" xlink:actuate="onLoad" draw:mime-type="image/png"/><svg:title>lines</svg:title></draw:frame></draw:a></text:p>
      <text:p text:style-name="P4">OK, so there might be some circles in the above image… but when it comes to layout, they fit together like rectangular boxes and not circles. In the end, laying out a webpage and positioning all its elements is deciding how you are going to nest and stack these boxes.</text:p>
      <text:p text:style-name="P3"><text:span text:style-name="T2">The only real complication here is that there are many ways to manipulate the size of these boxes, and the space between them, using </text:span><text:span text:style-name="Source_20_Text"><text:span text:style-name="T4">padding</text:span></text:span><text:span text:style-name="T2">, </text:span><text:span text:style-name="Source_20_Text"><text:span text:style-name="T4">border</text:span></text:span><text:span text:style-name="T2">, and </text:span><text:span text:style-name="Source_20_Text"><text:span text:style-name="T4">margin</text:span></text:span><text:span text:style-name="T2">. The assigned articles go into more depth on this concept, but to sum it up briefly:</text:span></text:p>
      <text:list text:style-name="L3">
        <text:list-item>
          <text:p text:style-name="P8"><text:soft-page-break/><text:span text:style-name="Source_20_Text"><text:span text:style-name="T4">padding</text:span></text:span><text:span text:style-name="T2"> increases the space between the border of a box and the content of the box.</text:span></text:p>
        </text:list-item>
        <text:list-item>
          <text:p text:style-name="P8"><text:span text:style-name="Source_20_Text"><text:span text:style-name="T4">border</text:span></text:span><text:span text:style-name="T2"> adds space (even if it’s only a pixel or two) between the margin and the padding.</text:span></text:p>
        </text:list-item>
        <text:list-item>
          <text:p text:style-name="P8"><text:span text:style-name="Source_20_Text"><text:span text:style-name="T4">margin</text:span></text:span><text:span text:style-name="T2"> increases the space between the borders of a box and the borders of adjacent boxes.</text:span></text:p>
        </text:list-item>
      </text:list>
      <text:p text:style-name="P4">Be sure to study the diagrams carefully.</text:p>
      <text:p text:style-name="P7"><text:bookmark text:name="assignment"/><draw:a xlink:type="simple" xlink:href="https://cdn.statically.io/gh/TheOdinProject/curriculum/c547923a86efaccb0fc71adf70fda2ea340b4cb1/foundations/html_css/css_foundations/the_box_model/imgs/box-model.png"><draw:frame draw:style-name="fr1" draw:name="Image3" text:anchor-type="as-char" svg:width="5.1043in" svg:height="3.75in" draw:z-index="2"><draw:image xlink:href="https://cdn.statically.io/gh/TheOdinProject/curriculum/c547923a86efaccb0fc71adf70fda2ea340b4cb1/foundations/html_css/css_foundations/the_box_model/imgs/box-model.png" xlink:type="simple" xlink:show="embed" xlink:actuate="onLoad" draw:mime-type="image/png"/><svg:title>the box model</svg:title></draw:frame></draw:a></text:p>
      <text:h text:style-name="P2" text:outline-level="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Inter" svg:font-family="Inter, '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12T22:12:31.752091178</meta:creation-date>
    <dc:date>2026-06-12T22:26:01.366018229</dc:date>
    <meta:editing-duration>PT3M18S</meta:editing-duration>
    <meta:editing-cycles>1</meta:editing-cycles>
    <meta:generator>LibreOffice/26.2.4.2$Linux_X86_64 LibreOffice_project/c44d3140fc62714965bf5d98735e0d79ba4b1ebd</meta:generator>
    <meta:document-statistic meta:table-count="0" meta:image-count="3" meta:object-count="0" meta:page-count="4" meta:paragraph-count="24" meta:word-count="486" meta:character-count="2628" meta:non-whitespace-character-count="2167"/>
  </office:meta>
</office:document-meta>
</file>